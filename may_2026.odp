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545cm" fo:min-width="1.406cm" loext:decorative="false"/>
      <style:paragraph-properties style:writing-mode="lr-tb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.989cm" fo:min-width="1.40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905cm" svg:height="1.27cm" svg:x="23.62cm" svg:y="4.175cm">
          <text:p text:style-name="P1"><text:span text:style-name="T1">neo4j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2" draw:text-style-name="P2" draw:layer="layout" svg:width="1.905cm" svg:height="0.635cm" svg:x="23.62cm" svg:y="2.905cm">
          <text:p text:style-name="P1"><text:span text:style-name="T1">neo ui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4.555cm" svg:y1="4.175cm" svg:x2="24.555cm" svg:y2="3.54cm">
          <text:p/>
        </draw:line>
        <draw:custom-shape draw:style-name="gr1" draw:text-style-name="P2" draw:layer="layout" svg:width="1.905cm" svg:height="1.27cm" svg:x="23.621cm" svg:y="9.775cm">
          <text:p text:style-name="P1"><text:span text:style-name="T1">open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2" draw:text-style-name="P2" draw:layer="layout" svg:width="1.905cm" svg:height="0.635cm" svg:x="23.621cm" svg:y="8.505cm">
          <text:p text:style-name="P1"><text:span text:style-name="T1">openS ui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4.556cm" svg:y1="9.775cm" svg:x2="24.556cm" svg:y2="9.14cm">
          <text:p/>
        </draw:line>
        <draw:custom-shape draw:style-name="gr1" draw:text-style-name="P2" draw:layer="layout" svg:width="1.905cm" svg:height="1.27cm" svg:x="23.621cm" svg:y="13.075cm">
          <text:p text:style-name="P1"><text:span text:style-name="T1">promet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2" draw:text-style-name="P2" draw:layer="layout" svg:width="1.905cm" svg:height="0.635cm" svg:x="23.621cm" svg:y="11.805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4.556cm" svg:y1="13.075cm" svg:x2="24.556cm" svg:y2="12.44cm">
          <text:p/>
        </draw:line>
        <draw:custom-shape draw:style-name="gr1" draw:text-style-name="P2" draw:layer="layout" svg:width="1.905cm" svg:height="1.27cm" svg:x="23.621cm" svg:y="6.175cm">
          <text:p text:style-name="P1"><text:span text:style-name="T1">pgvecto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2" draw:text-style-name="P2" draw:layer="layout" svg:width="1.905cm" svg:height="0.635cm" svg:x="15.821cm" svg:y="1.905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756cm" svg:y1="3.175cm" svg:x2="16.756cm" svg:y2="2.54cm">
          <text:p/>
        </draw:line>
        <draw:custom-shape draw:style-name="gr4" draw:text-style-name="P2" draw:layer="layout" svg:width="1.905cm" svg:height="1.239cm" svg:x="15.822cm" svg:y="3.206cm">
          <text:p text:style-name="P1"><text:span text:style-name="T1">doc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0.635cm" svg:x="10.795cm" svg:y="3.175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73cm" svg:y1="4.445cm" svg:x2="11.73cm" svg:y2="3.81cm">
          <text:p/>
        </draw:line>
        <draw:custom-shape draw:style-name="gr4" draw:text-style-name="P2" draw:layer="layout" svg:width="1.905cm" svg:height="1.239cm" svg:x="10.796cm" svg:y="4.476cm">
          <text:p text:style-name="P1"><text:span text:style-name="T1">doc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5:26:23.517879688</meta:creation-date>
    <dc:date>2026-05-19T15:40:25.293156854</dc:date>
    <meta:editing-duration>PT2M47S</meta:editing-duration>
    <meta:editing-cycles>1</meta:editing-cycles>
    <meta:document-statistic meta:object-count="39"/>
    <meta:generator>LibreOffice/26.2.0.3$Linux_X86_64 LibreOffice_project/afbbd0df0edb6d40b450b0337ac646b0913a760c</meta:generator>
  </office:meta>
</office:document-meta>
</file>