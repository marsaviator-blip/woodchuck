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6f9d4" draw:textarea-horizontal-align="justify" draw:textarea-vertical-align="middle" draw:auto-grow-height="false" fo:min-height="5.465cm" fo:min-width="7.12cm" loext:decorative="false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9.91cm" fo:min-width="0.1cm" loext:decorative="false"/>
      <style:paragraph-properties style:writing-mode="lr-tb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5" style:family="graphic" style:parent-style-name="standard">
      <style:graphic-properties draw:stroke="none" draw:fill="solid" draw:fill-color="#cccccc" dr3d:vertical-segments="16" dr3d:close-front="true" dr3d:close-back="tru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7.12cm" loext:decorative="false"/>
      <style:paragraph-properties style:writing-mode="lr-tb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0.199cm" fo:min-width="0.847cm" loext:decorative="false"/>
    </style:style>
    <style:style style:name="gr9" style:family="graphic" style:parent-style-name="standard">
      <style:graphic-properties draw:fill="solid" draw:fill-color="#bf819e" draw:textarea-horizontal-align="justify" draw:textarea-vertical-align="middle" draw:auto-grow-height="false" fo:min-height="0.199cm" fo:min-width="3.991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995cm" fo:min-width="3.54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546cm" fo:min-width="2.64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16173"/>
      <style:paragraph-properties fo:text-align="center"/>
    </style:style>
    <style:style style:name="P7" style:family="paragraph">
      <loext:graphic-properties draw:fill="solid" draw:fill-color="#bf819e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5.715cm" svg:x="12.065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0.16cm" svg:x="2.54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54cm" svg:height="1.27cm" svg:x="23.835cm" svg:y="5.275cm">
          <text:p text:style-name="P3"><text:span text:style-name="T1">UI</text:span></text:p>
          <draw:enhanced-geometry svg:viewBox="0 0 21600 21600" draw:type="rectangle" draw:enhanced-path="M 0 0 L 21600 0 21600 21600 0 21600 0 0 Z N"/>
        </draw:custom-shape>
        <dr3d:scene draw:style-name="gr4" xml:id="id1" draw:id="id1" svg:width="2.54cm" svg:height="2.54cm" svg:x="20.525cm" svg:y="4.64cm" dr3d:vrp="(0 0 16885.7142857143)" dr3d:vpn="(0 0 14285.7142857143)" dr3d:projection="perspective" dr3d:distance="0.1cm" dr3d:focal-length="0.1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connector draw:style-name="gr6" draw:text-style-name="P5" draw:layer="layout" draw:type="line" svg:x1="23.065cm" svg:y1="5.91cm" svg:x2="23.835cm" svg:y2="5.91cm" draw:start-shape="id1" draw:end-shape="id2" draw:end-glue-point="3" svg:d="M23065 5910h770" svg:viewBox="0 0 771 1">
          <text:p/>
        </draw:connector>
        <draw:custom-shape draw:style-name="gr7" draw:text-style-name="P4" draw:layer="layout" svg:width="7.62cm" svg:height="1.27cm" svg:x="3.775cm" svg:y="4.14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1.905cm" svg:height="0.635cm" svg:x="4.41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1.905cm" svg:height="0.635cm" svg:x="6.711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9.012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.692cm" svg:y1="4.745cm" svg:x2="3.81cm" svg:y2="4.757cm" svg:d="M1692 4745l2118 12" svg:viewBox="0 0 2119 13">
          <text:p/>
        </draw:connector>
        <draw:connector draw:style-name="gr6" draw:text-style-name="P5" draw:layer="layout" draw:type="line" svg:x1="7.585cm" svg:y1="2.381cm" svg:x2="7.664cm" svg:y2="4.446cm" draw:start-shape="id3" draw:start-glue-point="2" draw:end-shape="id4" draw:end-glue-point="4" svg:d="M7585 2381l79 2065" svg:viewBox="0 0 80 2066">
          <text:p/>
        </draw:connector>
        <draw:connector draw:style-name="gr6" draw:text-style-name="P5" draw:layer="layout" draw:type="line" svg:x1="5.68cm" svg:y1="4.445cm" svg:x2="6.208cm" svg:y2="2.45cm" svg:d="M5680 4445l528-1995" svg:viewBox="0 0 529 1996">
          <text:p/>
        </draw:connector>
        <draw:connector draw:style-name="gr6" draw:text-style-name="P5" draw:layer="layout" draw:type="line" svg:x1="6.734cm" svg:y1="2.465cm" svg:x2="6.036cm" svg:y2="4.538cm" draw:end-shape="id5" draw:end-glue-point="11" svg:d="M6734 2465l-698 2073" svg:viewBox="0 0 699 2074">
          <text:p/>
        </draw:connector>
        <draw:custom-shape draw:style-name="gr9" draw:text-style-name="P7" xml:id="id3" draw:id="id3" draw:layer="layout" svg:width="6.349cm" svg:height="0.635cm" svg:x="4.411cm" svg:y="1.746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8.02cm" svg:y1="4.446cm" svg:x2="8.22cm" svg:y2="2.381cm">
          <text:p/>
        </draw:line>
        <draw:line draw:style-name="gr10" draw:text-style-name="P5" draw:layer="layout" svg:x1="9.49cm" svg:y1="2.381cm" svg:x2="9.49cm" svg:y2="4.447cm">
          <text:p/>
        </draw:line>
        <draw:line draw:style-name="gr10" draw:text-style-name="P5" draw:layer="layout" svg:x1="10.125cm" svg:y1="4.447cm" svg:x2="10.125cm" svg:y2="1.905cm">
          <text:p/>
        </draw:line>
        <draw:custom-shape draw:style-name="gr11" draw:text-style-name="P3" xml:id="id7" draw:id="id7" draw:layer="layout" svg:width="5.715cm" svg:height="3.175cm" svg:x="13.3cm" svg:y="4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445cm" svg:height="2.54cm" svg:x="13.965cm" svg:y="5.345cm">
          <text:p text:style-name="P3"><text:span text:style-name="T2">Embedd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3.09cm" svg:height="0.806cm" svg:x="14.655cm" svg:y="4.445cm">
          <draw:text-box>
            <text:p><text:span text:style-name="T1">VectorStore</text:span></text:p>
          </draw:text-box>
        </draw:frame>
        <draw:line draw:style-name="gr10" draw:text-style-name="P5" draw:layer="layout" svg:x1="11.395cm" svg:y1="4.645cm" svg:x2="13.3cm" svg:y2="5.28cm">
          <text:p/>
        </draw:line>
        <draw:custom-shape draw:style-name="gr7" draw:text-style-name="P4" draw:layer="layout" svg:width="7.62cm" svg:height="1.27cm" svg:x="3.775cm" svg:y="8.446cm">
          <text:p text:style-name="P10"/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1.905cm" svg:height="0.635cm" svg:x="9.012cm" svg:y="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6.349cm" svg:height="0.635cm" svg:x="4.411cm" svg:y="6.047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19cm" svg:y1="6.682cm" svg:x2="10.19cm" svg:y2="8.748cm">
          <text:p/>
        </draw:line>
        <draw:line draw:style-name="gr10" draw:text-style-name="P5" draw:layer="layout" svg:x1="9.625cm" svg:y1="8.748cm" svg:x2="9.625cm" svg:y2="6.682cm">
          <text:p/>
        </draw:line>
        <draw:connector draw:style-name="gr6" draw:text-style-name="P5" draw:layer="layout" draw:type="line" svg:x1="1.692cm" svg:y1="9.045cm" svg:x2="9.012cm" svg:y2="9.066cm" draw:end-shape="id6" draw:end-glue-point="6" svg:d="M1692 9045l7320 21" svg:viewBox="0 0 7321 22">
          <text:p/>
        </draw:connector>
        <draw:connector draw:style-name="gr6" draw:text-style-name="P5" draw:layer="layout" draw:type="line" svg:x1="10.917cm" svg:y1="9.066cm" svg:x2="13.3cm" svg:y2="5.662cm" draw:start-shape="id6" draw:start-glue-point="10" draw:end-shape="id7" svg:d="M10917 9066l2383-3404" svg:viewBox="0 0 2384 3405">
          <text:p/>
        </draw:connector>
        <draw:connector draw:style-name="gr6" draw:text-style-name="P5" draw:layer="layout" draw:type="line" svg:x1="19.015cm" svg:y1="5.663cm" svg:x2="20.525cm" svg:y2="5.91cm" draw:start-shape="id7" draw:start-glue-point="10" draw:end-shape="id1" draw:end-glue-point="3" svg:d="M19015 5663l1510 247" svg:viewBox="0 0 1511 248">
          <text:p/>
        </draw:connector>
        <draw:frame draw:style-name="gr13" draw:text-style-name="P9" draw:layer="layout" svg:width="1.3cm" svg:height="0.806cm" svg:x="2.205cm" svg:y="2.569cm">
          <draw:text-box>
            <text:p><text:span text:style-name="T1">API</text:span></text:p>
          </draw:text-box>
        </draw:frame>
        <draw:line draw:style-name="gr10" draw:text-style-name="P5" draw:layer="layout" svg:x1="17.78cm" svg:y1="12.065cm" svg:x2="1.27cm" svg:y2="12.065cm">
          <text:p/>
        </draw:line>
        <draw:line draw:style-name="gr10" draw:text-style-name="P5" draw:layer="layout" svg:x1="20.919cm" svg:y1="7.561cm" svg:x2="17.78cm" svg:y2="12.084cm">
          <text:p/>
        </draw:line>
        <draw:frame draw:style-name="gr13" draw:text-style-name="P9" draw:layer="layout" svg:width="1.906cm" svg:height="0.806cm" svg:x="0.635cm" svg:y="3.939cm">
          <draw:text-box>
            <text:p><text:span text:style-name="T1">trigger</text:span></text:p>
          </draw:text-box>
        </draw:frame>
        <draw:frame draw:style-name="gr13" draw:text-style-name="P9" draw:layer="layout" svg:width="1.906cm" svg:height="0.806cm" svg:x="0.635cm" svg:y="8.239cm">
          <draw:text-box>
            <text:p><text:span text:style-name="T1">trigger</text:span></text:p>
          </draw:text-box>
        </draw:frame>
        <draw:frame draw:style-name="gr13" draw:text-style-name="P9" draw:layer="layout" svg:width="1.191cm" svg:height="0.806cm" svg:x="1.349cm" svg:y="11.259cm">
          <draw:text-box>
            <text:p><text:span text:style-name="T1">get</text:span></text:p>
          </draw:text-box>
        </draw:frame>
        <draw:frame draw:style-name="gr13" draw:text-style-name="P9" draw:layer="layout" svg:width="2.043cm" svg:height="0.806cm" svg:x="6.847cm" svg:y="1.099cm">
          <draw:text-box>
            <text:p><text:span text:style-name="T1">ex. MP</text:span></text:p>
          </draw:text-box>
        </draw:frame>
        <draw:frame draw:style-name="gr13" draw:text-style-name="P9" draw:layer="layout" svg:width="2.98cm" svg:height="0.806cm" svg:x="14.605cm" svg:y="3.004cm">
          <draw:text-box>
            <text:p><text:span text:style-name="T1">Spring ETL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6:58:31.437724150</meta:creation-date>
    <dc:date>2026-05-11T17:38:10.344256599</dc:date>
    <meta:editing-duration>PT7M9S</meta:editing-duration>
    <meta:editing-cycles>1</meta:editing-cycles>
    <meta:document-statistic meta:object-count="61"/>
    <meta:generator>LibreOffice/26.2.0.3$Linux_X86_64 LibreOffice_project/afbbd0df0edb6d40b450b0337ac646b0913a760c</meta:generator>
  </office:meta>
</office:document-meta>
</file>