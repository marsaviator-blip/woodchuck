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text-properties fo:font-size="18pt" officeooo:rsid="0001402c" officeooo:paragraph-rsid="0001402c" style:font-size-asian="18pt" style:font-size-complex="18pt"/>
    </style:style>
    <style:style style:name="P2" style:family="paragraph" style:parent-style-name="Text_20_body">
      <style:text-properties fo:font-weight="bold" officeooo:rsid="000611d0" officeooo:paragraph-rsid="00058af3" style:font-weight-asian="bold" style:font-weight-complex="bold"/>
    </style:style>
    <style:style style:name="P3" style:family="paragraph" style:parent-style-name="Contents_20_1">
      <style:paragraph-properties>
        <style:tab-stops>
          <style:tab-stop style:position="6.9244in" style:type="right" style:leader-style="dotted" style:leader-text="."/>
        </style:tab-stops>
      </style:paragraph-properties>
    </style:style>
    <style:style style:name="P4" style:family="paragraph" style:parent-style-name="Contents_20_2">
      <style:paragraph-properties>
        <style:tab-stops>
          <style:tab-stop style:position="6.728in" style:type="right" style:leader-style="dotted" style:leader-text="."/>
        </style:tab-stops>
      </style:paragraph-properties>
    </style:style>
    <style:style style:name="P5" style:family="paragraph" style:parent-style-name="Contents_20_3">
      <style:paragraph-properties>
        <style:tab-stops>
          <style:tab-stop style:position="6.5307in" style:type="right" style:leader-style="dotted" style:leader-text="."/>
        </style:tab-stops>
      </style:paragraph-properties>
    </style:style>
    <style:style style:name="P6" style:family="paragraph" style:parent-style-name="Text_20_body">
      <style:text-properties fo:font-weight="bold" officeooo:rsid="00058af3" officeooo:paragraph-rsid="00058af3" style:font-weight-asian="bold" style:font-weight-complex="bold"/>
    </style:style>
    <style:style style:name="P7" style:family="paragraph" style:parent-style-name="Heading_20_1">
      <style:paragraph-properties fo:break-before="page"/>
    </style:style>
    <style:style style:name="P8" style:family="paragraph" style:parent-style-name="Text_20_body">
      <style:text-properties fo:font-weight="normal" officeooo:rsid="000611d0" officeooo:paragraph-rsid="000611d0" style:font-weight-asian="normal" style:font-weight-complex="normal"/>
    </style:style>
    <style:style style:name="P9" style:family="paragraph" style:parent-style-name="Text_20_body">
      <style:text-properties fo:font-weight="normal" officeooo:rsid="0007f265" officeooo:paragraph-rsid="0007f265" style:font-weight-asian="normal" style:font-weight-complex="normal"/>
    </style:style>
    <style:style style:name="P10" style:family="paragraph" style:parent-style-name="Text_20_body">
      <style:text-properties fo:font-weight="normal" officeooo:rsid="000dc2a8" officeooo:paragraph-rsid="00143f03" style:font-weight-asian="normal" style:font-weight-complex="normal"/>
    </style:style>
    <style:style style:name="P11" style:family="paragraph" style:parent-style-name="Text_20_body">
      <style:text-properties fo:font-weight="normal" officeooo:rsid="000e4610" officeooo:paragraph-rsid="00143f03" style:font-weight-asian="normal" style:font-weight-complex="normal"/>
    </style:style>
    <style:style style:name="P12" style:family="paragraph" style:parent-style-name="Text_20_body">
      <style:text-properties fo:font-weight="normal" officeooo:rsid="000f7a3e" officeooo:paragraph-rsid="00143f03" style:font-weight-asian="normal" style:font-weight-complex="normal"/>
    </style:style>
    <style:style style:name="P13" style:family="paragraph" style:parent-style-name="Text_20_body">
      <style:text-properties fo:font-weight="normal" officeooo:rsid="00112a37" officeooo:paragraph-rsid="00143f03" style:font-weight-asian="normal" style:font-weight-complex="normal"/>
    </style:style>
    <style:style style:name="P14" style:family="paragraph" style:parent-style-name="Text_20_body">
      <style:text-properties fo:font-weight="normal" officeooo:rsid="00087ca6" officeooo:paragraph-rsid="00143f03" style:font-weight-asian="normal" style:font-weight-complex="normal"/>
    </style:style>
    <style:style style:name="P15" style:family="paragraph" style:parent-style-name="Text_20_body">
      <style:text-properties fo:font-weight="normal" officeooo:rsid="00090489" officeooo:paragraph-rsid="00143f03" style:font-weight-asian="normal" style:font-weight-complex="normal"/>
    </style:style>
    <style:style style:name="P16" style:family="paragraph" style:parent-style-name="Text_20_body">
      <style:text-properties fo:font-weight="normal" officeooo:rsid="001658b9" officeooo:paragraph-rsid="00143f03" style:font-weight-asian="normal" style:font-weight-complex="normal"/>
    </style:style>
    <style:style style:name="P17" style:family="paragraph" style:parent-style-name="Text_20_body">
      <style:text-properties officeooo:rsid="0001402c" officeooo:paragraph-rsid="0001402c"/>
    </style:style>
    <style:style style:name="P18" style:family="paragraph" style:parent-style-name="Text_20_body">
      <style:text-properties officeooo:rsid="00050fce" officeooo:paragraph-rsid="00050fce"/>
    </style:style>
    <style:style style:name="P19" style:family="paragraph" style:parent-style-name="Text_20_body">
      <style:text-properties officeooo:rsid="00058af3" officeooo:paragraph-rsid="00058af3"/>
    </style:style>
    <style:style style:name="P20" style:family="paragraph" style:parent-style-name="Text_20_body">
      <style:text-properties officeooo:paragraph-rsid="0007f265"/>
    </style:style>
    <style:style style:name="P21" style:family="paragraph" style:parent-style-name="Text_20_body">
      <style:text-properties fo:font-weight="normal" officeooo:rsid="00089ba9" officeooo:paragraph-rsid="00089ba9" style:font-weight-asian="normal" style:font-weight-complex="normal"/>
    </style:style>
    <style:style style:name="P22" style:family="paragraph" style:parent-style-name="Text_20_body">
      <style:text-properties fo:font-weight="normal" officeooo:rsid="001304ef" officeooo:paragraph-rsid="001304ef" style:font-weight-asian="normal" style:font-weight-complex="normal"/>
    </style:style>
    <style:style style:name="P23" style:family="paragraph" style:parent-style-name="Text_20_body">
      <style:text-properties fo:font-weight="normal" officeooo:rsid="000ddca3" officeooo:paragraph-rsid="000ddca3" style:font-weight-asian="normal" style:font-weight-complex="normal"/>
    </style:style>
    <style:style style:name="P24" style:family="paragraph" style:parent-style-name="Text_20_body">
      <style:text-properties fo:font-weight="normal" officeooo:rsid="00089ba9" officeooo:paragraph-rsid="00115b91" style:font-weight-asian="normal" style:font-weight-complex="normal"/>
    </style:style>
    <style:style style:name="P25" style:family="paragraph" style:parent-style-name="Text_20_body">
      <style:text-properties fo:font-weight="normal" officeooo:rsid="00115b91" officeooo:paragraph-rsid="00115b91" style:font-weight-asian="normal" style:font-weight-complex="normal"/>
    </style:style>
    <style:style style:name="P26" style:family="paragraph" style:parent-style-name="Text_20_body">
      <style:text-properties officeooo:rsid="00115b91" officeooo:paragraph-rsid="00115b91"/>
    </style:style>
    <style:style style:name="P27" style:family="paragraph" style:parent-style-name="Text_20_body">
      <style:text-properties fo:font-weight="bold" officeooo:rsid="00058af3" officeooo:paragraph-rsid="000611d0" style:font-weight-asian="bold" style:font-weight-complex="bold"/>
    </style:style>
    <style:style style:name="P28" style:family="paragraph" style:parent-style-name="Text_20_body">
      <style:text-properties officeooo:rsid="00089ba9" officeooo:paragraph-rsid="00089ba9"/>
    </style:style>
    <style:style style:name="T1" style:family="text">
      <style:text-properties officeooo:rsid="00050fce"/>
    </style:style>
    <style:style style:name="T2" style:family="text">
      <style:text-properties officeooo:rsid="000611d0"/>
    </style:style>
    <style:style style:name="T3" style:family="text">
      <style:text-properties officeooo:rsid="000abe0a"/>
    </style:style>
    <style:style style:name="T4" style:family="text">
      <style:text-properties officeooo:rsid="000e4610"/>
    </style:style>
    <style:style style:name="T5" style:family="text">
      <style:text-properties officeooo:rsid="000f7a3e"/>
    </style:style>
    <style:style style:name="T6" style:family="text">
      <style:text-properties officeooo:rsid="000e76ae"/>
    </style:style>
    <style:style style:name="T7" style:family="text">
      <style:text-properties officeooo:rsid="00107720"/>
    </style:style>
    <style:style style:name="T8" style:family="text">
      <style:text-properties officeooo:rsid="00117e7e"/>
    </style:style>
    <style:style style:name="T9" style:family="text">
      <style:text-properties officeooo:rsid="00112a37"/>
    </style:style>
    <style:style style:name="T10" style:family="text">
      <style:text-properties officeooo:rsid="00113ca6"/>
    </style:style>
    <style:style style:name="T11" style:family="text">
      <style:text-properties officeooo:rsid="0012d7d9"/>
    </style:style>
    <style:style style:name="T12" style:family="text">
      <style:text-properties officeooo:rsid="000f426c"/>
    </style:style>
    <style:style style:name="T13" style:family="text">
      <style:text-properties officeooo:rsid="0007f265"/>
    </style:style>
    <style:style style:name="T14" style:family="text">
      <style:text-properties officeooo:rsid="00058af3"/>
    </style:style>
    <style:style style:name="T15" style:family="text">
      <style:text-properties officeooo:rsid="00102dae"/>
    </style:style>
    <style:style style:name="T16" style:family="text">
      <style:text-properties officeooo:rsid="0002363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g</text:span>aZap Test Effort</text:p>
      <text:p text:style-name="P1">(will improve on another pas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313_2460469384" office:name="I. Introduction" text:style-name="Index_20_Link" text:visited-style-name="Index_20_Link">I. Introduction<text:tab/>2</text:a></text:p>
          <text:p text:style-name="P3"><text:a xlink:type="simple" xlink:href="#__RefHeading___Toc315_2460469384" office:name="II. Domains of study (applied gaZap)" text:style-name="Index_20_Link" text:visited-style-name="Index_20_Link">II. Domains of study (applied gaZap)<text:tab/>2</text:a></text:p>
          <text:p text:style-name="P3"><text:a xlink:type="simple" xlink:href="#__RefHeading___Toc317_2460469384" office:name="III. gaZap – a tool for domain studies" text:style-name="Index_20_Link" text:visited-style-name="Index_20_Link">III. gaZap – a tool for domain studies<text:tab/>2</text:a></text:p>
          <text:p text:style-name="P3"><text:a xlink:type="simple" xlink:href="#__RefHeading___Toc471_2460469384" office:name="IV. Technology applied to gaZap" text:style-name="Index_20_Link" text:visited-style-name="Index_20_Link">IV. Technology applied to gaZap<text:tab/>2</text:a></text:p>
          <text:p text:style-name="P4"><text:a xlink:type="simple" xlink:href="#__RefHeading___Toc473_2460469384" office:name="IV.1. Spring" text:style-name="Index_20_Link" text:visited-style-name="Index_20_Link">IV.1. Spring<text:tab/>2</text:a></text:p>
          <text:p text:style-name="P5"><text:a xlink:type="simple" xlink:href="#__RefHeading___Toc475_2460469384" office:name="IV.1.a RestController/swagger" text:style-name="Index_20_Link" text:visited-style-name="Index_20_Link">IV.1.a RestController/swagger<text:tab/>2</text:a></text:p>
          <text:p text:style-name="P5"><text:a xlink:type="simple" xlink:href="#__RefHeading___Toc477_2460469384" office:name="IV.1.b Service" text:style-name="Index_20_Link" text:visited-style-name="Index_20_Link">IV.1.b Service<text:tab/>2</text:a></text:p>
          <text:p text:style-name="P5"><text:a xlink:type="simple" xlink:href="#__RefHeading___Toc479_2460469384" office:name="IV.1.c Annotation" text:style-name="Index_20_Link" text:visited-style-name="Index_20_Link">IV.1.c Annotation<text:tab/>2</text:a></text:p>
          <text:p text:style-name="P4"><text:a xlink:type="simple" xlink:href="#__RefHeading___Toc481_2460469384" office:name="IV.2 Temporal" text:style-name="Index_20_Link" text:visited-style-name="Index_20_Link">IV.2 Temporal<text:tab/>2</text:a></text:p>
          <text:p text:style-name="P4"><text:a xlink:type="simple" xlink:href="#__RefHeading___Toc483_2460469384" office:name="IV.3 Docling" text:style-name="Index_20_Link" text:visited-style-name="Index_20_Link">IV.3 Docling<text:tab/>2</text:a></text:p>
          <text:p text:style-name="P4"><text:a xlink:type="simple" xlink:href="#__RefHeading___Toc485_2460469384" office:name="IV.4 Embeddings models" text:style-name="Index_20_Link" text:visited-style-name="Index_20_Link">IV.4 Embeddings models<text:tab/>3</text:a></text:p>
          <text:p text:style-name="P5"><text:a xlink:type="simple" xlink:href="#__RefHeading___Toc487_2460469384" office:name="IV.4.a OpenAI" text:style-name="Index_20_Link" text:visited-style-name="Index_20_Link">IV.4.a OpenAI<text:tab/>3</text:a></text:p>
          <text:p text:style-name="P5"><text:a xlink:type="simple" xlink:href="#__RefHeading___Toc489_2460469384" office:name="IV.4.b Ollama" text:style-name="Index_20_Link" text:visited-style-name="Index_20_Link">IV.4.b Ollama<text:tab/>3</text:a></text:p>
          <text:p text:style-name="P4"><text:a xlink:type="simple" xlink:href="#__RefHeading___Toc491_2460469384" office:name="IV.5 Vector stores" text:style-name="Index_20_Link" text:visited-style-name="Index_20_Link">IV.5 Vector stores<text:tab/>3</text:a></text:p>
          <text:p text:style-name="P5"><text:a xlink:type="simple" xlink:href="#__RefHeading___Toc5229_2460469384" office:name="IV.5.a Postgres/pgvector" text:style-name="Index_20_Link" text:visited-style-name="Index_20_Link">IV.5.a Postgres/pgvector<text:tab/>3</text:a></text:p>
          <text:p text:style-name="P5"><text:a xlink:type="simple" xlink:href="#__RefHeading___Toc5231_2460469384" office:name="IV.5.b OpenSearch" text:style-name="Index_20_Link" text:visited-style-name="Index_20_Link">IV.5.b OpenSearch<text:tab/>3</text:a></text:p>
          <text:p text:style-name="P5"><text:a xlink:type="simple" xlink:href="#__RefHeading___Toc5233_2460469384" office:name="IV.5.c Redis" text:style-name="Index_20_Link" text:visited-style-name="Index_20_Link">IV.5.c Redis<text:tab/>3</text:a></text:p>
          <text:p text:style-name="P5"><text:a xlink:type="simple" xlink:href="#__RefHeading___Toc5235_2460469384" office:name="IV.5.d Neo4j" text:style-name="Index_20_Link" text:visited-style-name="Index_20_Link">IV.5.d Neo4j<text:tab/>3</text:a></text:p>
          <text:p text:style-name="P4"><text:a xlink:type="simple" xlink:href="#__RefHeading___Toc493_2460469384" office:name="IV.6 Observability" text:style-name="Index_20_Link" text:visited-style-name="Index_20_Link">IV.6 Observability<text:tab/>3</text:a></text:p>
          <text:p text:style-name="P5"><text:a xlink:type="simple" xlink:href="#__RefHeading___Toc495_2460469384" office:name="IV.6.a micrometer" text:style-name="Index_20_Link" text:visited-style-name="Index_20_Link">IV.6.a micrometer<text:tab/>3</text:a></text:p>
          <text:p text:style-name="P5"><text:a xlink:type="simple" xlink:href="#__RefHeading___Toc497_2460469384" office:name="IV.6.b opensearch" text:style-name="Index_20_Link" text:visited-style-name="Index_20_Link">IV.6.b opensearch<text:tab/>3</text:a></text:p>
          <text:p text:style-name="P4"><text:a xlink:type="simple" xlink:href="#__RefHeading___Toc2475_2460469384" office:name="IV.7 User Interface" text:style-name="Index_20_Link" text:visited-style-name="Index_20_Link">IV.7 User Interface<text:tab/>3</text:a></text:p>
          <text:p text:style-name="P5"><text:a xlink:type="simple" xlink:href="#__RefHeading___Toc2477_2460469384" office:name="IV.7.a Vue3" text:style-name="Index_20_Link" text:visited-style-name="Index_20_Link">IV.7.a Vue3<text:tab/>3</text:a></text:p>
          <text:p text:style-name="P3"><text:a xlink:type="simple" xlink:href="#__RefHeading___Toc499_2460469384" office:name="V. Getting the pieces" text:style-name="Index_20_Link" text:visited-style-name="Index_20_Link">V. Getting the pieces<text:tab/>4</text:a></text:p>
          <text:p text:style-name="P4"><text:a xlink:type="simple" xlink:href="#__RefHeading___Toc501_2460469384" office:name="V.1 development tools" text:style-name="Index_20_Link" text:visited-style-name="Index_20_Link">V.1 development tools<text:tab/>4</text:a></text:p>
          <text:p text:style-name="P4"><text:a xlink:type="simple" xlink:href="#__RefHeading___Toc503_2460469384" office:name="V.2 runtime tools" text:style-name="Index_20_Link" text:visited-style-name="Index_20_Link">V.2 runtime tools<text:tab/>4</text:a></text:p>
          <text:p text:style-name="P3"><text:a xlink:type="simple" xlink:href="#__RefHeading___Toc505_2460469384" office:name="VI. Starting the pieces" text:style-name="Index_20_Link" text:visited-style-name="Index_20_Link">VI. Starting the pieces<text:tab/>4</text:a></text:p>
          <text:p text:style-name="P3"><text:a xlink:type="simple" xlink:href="#__RefHeading___Toc507_2460469384" office:name="VII. Track running pieces" text:style-name="Index_20_Link" text:visited-style-name="Index_20_Link">VII. Track running pieces<text:tab/>4</text:a></text:p>
          <text:p text:style-name="P3"><text:a xlink:type="simple" xlink:href="#__RefHeading___Toc509_2460469384" office:name="VIII. Knowledge/info" text:style-name="Index_20_Link" text:visited-style-name="Index_20_Link">VIII. Knowledge/info<text:tab/>5</text:a></text:p>
        </text:index-body>
      </text:table-of-content>
      <text:p text:style-name="P6"/>
      <text:p text:style-name="P6"/>
      <text:h text:style-name="P7" text:outline-level="1"><text:bookmark-start text:name="__RefHeading___Toc313_2460469384"/><text:span text:style-name="T2">I.<text:tab/></text:span>Introduction<text:bookmark-end text:name="__RefHeading___Toc313_2460469384"/></text:h>
      <text:p text:style-name="P8">partly a cheat sheet, a how to, and pointers to information</text:p>
      <text:p text:style-name="P8"/>
      <text:h text:style-name="Heading_20_1" text:outline-level="1"><text:bookmark-start text:name="__RefHeading___Toc315_2460469384"/><text:span text:style-name="T2">II.<text:tab/></text:span>Domains of study <text:span text:style-name="T2">(applied gaZap)</text:span><text:bookmark-end text:name="__RefHeading___Toc315_2460469384"/></text:h>
      <text:p text:style-name="P9">explanations of using gaZap (how <text:span text:style-name="T3">and why</text:span>)</text:p>
      <text:p text:style-name="P10">There will be a number of starting points for the user. </text:p>
      <text:p text:style-name="P10">1) Define chemical domain of related formulas, enzymes, ligands, polymers.</text:p>
      <text:p text:style-name="P10">2) Specify thermodynamic &amp; phase equilibria systems.</text:p>
      <text:p text:style-name="P10">3) A manufacturer process <text:span text:style-name="T4">or lab technique</text:span></text:p>
      <text:p text:style-name="P10">4) A single entry in rcsb, materials <text:span text:style-name="T4">project [or other database we decide to include] for the sole purpose of identifying any flaws or holes in the data currently stored.</text:span></text:p>
      <text:p text:style-name="P11">The starting point for the user should be straightforward. Then gaZap goes to work gathering available <text:span text:style-name="T5">experimental </text:span>data, the associated publications expanding to cross references <text:span text:style-name="T6">and if possible run </text:span><text:span text:style-name="T5">or gather </text:span><text:span text:style-name="T6">known material and chemical calculations </text:span><text:span text:style-name="T5">for example</text:span><text:span text:style-name="T6"> a </text:span><text:span text:style-name="T5">sequence </text:span><text:span text:style-name="T6">alignment. <text:s/></text:span><text:span text:style-name="T5">The direct experimental and calculated data will constrain the llm analysis.</text:span></text:p>
      <text:p text:style-name="P12">A user may have many reasons for running gaZap. <text:s/>If it goes to plan they will have a complete bibliography of <text:span text:style-name="T7">their</text:span> domain <text:span text:style-name="T7">of interest, knowledge on research subject or known aspects of processing materials. <text:s/>It should expose the domain’s current state of knowledge, reveal areas users have yet to understand, identify discrepancies in the current state with possible explanations why. </text:span></text:p>
      <text:p text:style-name="P12"><text:span text:style-name="T7">For example one document may say a substance inhibits while another document says it activates or facilitates. <text:s/>If experiments are the same or </text:span><text:span text:style-name="T8">wether</text:span><text:span text:style-name="T7"> the two </text:span><text:span text:style-name="T8">have methodologies</text:span><text:span text:style-name="T9"> </text:span><text:span text:style-name="T8">performed</text:span><text:span text:style-name="T9"> </text:span><text:span text:style-name="T7">at different concentrations </text:span><text:span text:style-name="T9">or thermodynamic conditions.</text:span><text:span text:style-name="T7"> Answer questions regarding all stated trends and conclusions </text:span><text:span text:style-name="T9">with focus on how they agree and verify or </text:span><text:span text:style-name="T8">where </text:span><text:span text:style-name="T9">variable inputs could possibly explain discrepancies.</text:span></text:p>
      <text:p text:style-name="P13">Can prior art be depended on? <text:s/>What is strong and dependable or what is suspicious. I’ll give you another example leaving out identification of individuals. <text:s/>A compound is in literature claiming twice the amount of oxygen in its crystalline form. <text:s/>Upon replicating the same mostly amorphous <text:span text:style-name="T10">material properties</text:span> with very little mechanical stress I found in a mortar and pestle <text:span text:style-name="T11">with </text:span>a quick <text:span text:style-name="T10">trituration(a mashing/pounding) it went from amorphous to </text:span><text:span text:style-name="T11">a </text:span><text:span text:style-name="T10">highly crystalline well-known form. <text:s/>I repeated the whole thing carefully weighing before and after. Zero weight change so it didn’t suddenly lose half its oxygen to the air!</text:span></text:p>
      <text:p text:style-name="P13"/>
      <text:p text:style-name="P14"><text:soft-page-break/>ex materials research</text:p>
      <text:p text:style-name="P14">ex citations</text:p>
      <text:p text:style-name="P15">ex data organization</text:p>
      <text:p text:style-name="P16">There will need to be a staging area/step where the user gets to see the metadata of the initial choices and how wild a run it will be.</text:p>
      <text:p text:style-name="P16">Then the big components can be persisted. Yet how long to retain? One postgres?</text:p>
      <text:p text:style-name="P15"/>
      <text:h text:style-name="Heading_20_1" text:outline-level="1"><text:bookmark-start text:name="__RefHeading___Toc317_2460469384"/><text:span text:style-name="T2">III.<text:tab/></text:span>gaZap – a tool for domain studies<text:bookmark-end text:name="__RefHeading___Toc317_2460469384"/></text:h>
      <text:p text:style-name="P9">explanations of what</text:p>
      <text:p text:style-name="P9"/>
      <text:h text:style-name="Heading_20_1" text:outline-level="1"><text:bookmark-start text:name="__RefHeading___Toc471_2460469384"/><text:span text:style-name="T2">IV.<text:tab/></text:span>Technology <text:span text:style-name="T12">applied to gaZap</text:span><text:bookmark-end text:name="__RefHeading___Toc471_2460469384"/></text:h>
      <text:h text:style-name="Heading_20_2" text:outline-level="2"><text:bookmark-start text:name="__RefHeading___Toc473_2460469384"/><text:span text:style-name="T2">IV.1.<text:tab/></text:span>Spring<text:bookmark-end text:name="__RefHeading___Toc473_2460469384"/></text:h>
      <text:h text:style-name="Heading_20_3" text:outline-level="3"><text:bookmark-start text:name="__RefHeading___Toc475_2460469384"/><text:span text:style-name="T2">IV.1.a<text:tab/><text:tab/></text:span>RestController/<text:span text:style-name="T13">swagger</text:span><text:bookmark-end text:name="__RefHeading___Toc475_2460469384"/></text:h>
      <text:h text:style-name="Heading_20_3" text:outline-level="3"><text:bookmark-start text:name="__RefHeading___Toc477_2460469384"/><text:span text:style-name="T2">IV.1.b</text:span><text:tab/>Service<text:bookmark-end text:name="__RefHeading___Toc477_2460469384"/></text:h>
      <text:h text:style-name="Heading_20_3" text:outline-level="3"><text:bookmark-start text:name="__RefHeading___Toc479_2460469384"/><text:span text:style-name="T2">IV.1.c<text:tab/><text:tab/></text:span>Annotation<text:bookmark-end text:name="__RefHeading___Toc479_2460469384"/></text:h>
      <text:p text:style-name="P17">&lt;document more stuff&gt;</text:p>
      <text:h text:style-name="Heading_20_2" text:outline-level="2"/>
      <text:h text:style-name="Heading_20_2" text:outline-level="2"><text:bookmark-start text:name="__RefHeading___Toc481_2460469384"/><text:span text:style-name="T2">IV.2<text:tab/></text:span>Temporal<text:bookmark-end text:name="__RefHeading___Toc481_2460469384"/></text:h>
      <text:p text:style-name="P17">&lt;document&gt;</text:p>
      <text:h text:style-name="Heading_20_2" text:outline-level="2"><text:bookmark-start text:name="__RefHeading___Toc483_2460469384"/><text:span text:style-name="T2">IV.3<text:tab/></text:span>Docling<text:bookmark-end text:name="__RefHeading___Toc483_2460469384"/></text:h>
      <text:p text:style-name="P17">&lt;document&gt;</text:p>
      <text:h text:style-name="Heading_20_2" text:outline-level="2"><text:bookmark-start text:name="__RefHeading___Toc485_2460469384"/><text:span text:style-name="T2">IV.4<text:tab/></text:span>Embedd<text:span text:style-name="T14">ings </text:span>model<text:span text:style-name="T14">s</text:span><text:bookmark-end text:name="__RefHeading___Toc485_2460469384"/></text:h>
      <text:h text:style-name="Heading_20_3" text:outline-level="3"><text:bookmark-start text:name="__RefHeading___Toc487_2460469384"/><text:span text:style-name="T2">IV.4.a</text:span><text:tab/><text:tab/>OpenAI<text:bookmark-end text:name="__RefHeading___Toc487_2460469384"/></text:h>
      <text:p text:style-name="P18"><text:tab/><text:tab/>no download. Must run on internet</text:p>
      <text:h text:style-name="Heading_20_3" text:outline-level="3"><text:bookmark-start text:name="__RefHeading___Toc489_2460469384"/><text:soft-page-break/><text:span text:style-name="T2">IV.4.b</text:span><text:tab/>Ollama<text:bookmark-end text:name="__RefHeading___Toc489_2460469384"/></text:h>
      <text:p text:style-name="Text_20_body">ar@pop-os:~$ curl -fsSL <text:a xlink:type="simple" xlink:href="https://ollama.com/install.sh" text:style-name="Internet_20_link" text:visited-style-name="Visited_20_Internet_20_Link">https://ollama.com/install.sh</text:a> | sh</text:p>
      <text:p text:style-name="Quotations">Installing ollama to /usr/local [sudo] password for ar: Downloading ollama-linux-amd64.tar.zst ######################################################################## 100.0% Creating ollama user... Adding ollama user to render group... Adding ollama user to video group... Adding current user to ollama group... Creating ollama systemd service... Enabling and starting ollama service... Created symlink /etc/systemd/system/default.target.wants/ollama.service → /etc/systemd/system/ollama.service. NVIDIA GPU installed.</text:p>
      <text:h text:style-name="Heading_20_3" text:outline-level="3"/>
      <text:h text:style-name="Heading_20_2" text:outline-level="2"><text:bookmark-start text:name="__RefHeading___Toc491_2460469384"/><text:span text:style-name="T2">IV.5<text:tab/></text:span>Vector stores<text:bookmark-end text:name="__RefHeading___Toc491_2460469384"/></text:h>
      <text:h text:style-name="Heading_20_3" text:outline-level="3"><text:bookmark-start text:name="__RefHeading___Toc5229_2460469384"/><text:span text:style-name="T15">IV.5.a<text:tab/><text:tab/></text:span>Postgres/<text:span text:style-name="T14">pgvector</text:span><text:bookmark-end text:name="__RefHeading___Toc5229_2460469384"/></text:h>
      <text:h text:style-name="Heading_20_3" text:outline-level="3"><text:bookmark-start text:name="__RefHeading___Toc5231_2460469384"/><text:span text:style-name="T15">IV.5.b<text:tab/></text:span>OpenSearch<text:bookmark-end text:name="__RefHeading___Toc5231_2460469384"/></text:h>
      <text:h text:style-name="Heading_20_3" text:outline-level="3"><text:bookmark-start text:name="__RefHeading___Toc5233_2460469384"/><text:span text:style-name="T15">IV.5.c</text:span><text:tab/><text:tab/>Redis<text:bookmark-end text:name="__RefHeading___Toc5233_2460469384"/></text:h>
      <text:h text:style-name="Heading_20_3" text:outline-level="3"><text:bookmark-start text:name="__RefHeading___Toc5235_2460469384"/><text:span text:style-name="T15">IV.5.d</text:span><text:tab/>Neo4j<text:bookmark-end text:name="__RefHeading___Toc5235_2460469384"/></text:h>
      <text:p text:style-name="P19"/>
      <text:h text:style-name="Heading_20_2" text:outline-level="2"><text:bookmark-start text:name="__RefHeading___Toc493_2460469384"/>IV.6<text:tab/>Observability<text:bookmark-end text:name="__RefHeading___Toc493_2460469384"/></text:h>
      <text:h text:style-name="Heading_20_3" text:outline-level="3"><text:bookmark-start text:name="__RefHeading___Toc495_2460469384"/>IV.6.a<text:tab/><text:tab/>micrometer<text:bookmark-end text:name="__RefHeading___Toc495_2460469384"/></text:h>
      <text:h text:style-name="Heading_20_3" text:outline-level="3"><text:bookmark-start text:name="__RefHeading___Toc497_2460469384"/>IV.6.b<text:tab/>opensearch<text:bookmark-end text:name="__RefHeading___Toc497_2460469384"/></text:h>
      <text:p text:style-name="Text_20_body"/>
      <text:h text:style-name="Heading_20_2" text:outline-level="2"><text:bookmark-start text:name="__RefHeading___Toc2475_2460469384"/><text:span text:style-name="T12">I</text:span>V.<text:span text:style-name="T12">7</text:span><text:tab/>User Interface<text:bookmark-end text:name="__RefHeading___Toc2475_2460469384"/></text:h>
      <text:h text:style-name="Heading_20_3" text:outline-level="3"><text:bookmark-start text:name="__RefHeading___Toc2477_2460469384"/><text:span text:style-name="T12">I</text:span>V.<text:span text:style-name="T12">7.a</text:span><text:tab/><text:tab/>Vue3<text:bookmark-end text:name="__RefHeading___Toc2477_2460469384"/></text:h>
      <text:p text:style-name="P20"/>
      <text:h text:style-name="Heading_20_1" text:outline-level="1"><text:bookmark-start text:name="__RefHeading___Toc499_2460469384"/><text:span text:style-name="T2">V.<text:tab/></text:span>Getting the pieces<text:bookmark-end text:name="__RefHeading___Toc499_2460469384"/></text:h>
      <text:h text:style-name="Heading_20_2" text:outline-level="2"><text:bookmark-start text:name="__RefHeading___Toc501_2460469384"/>V.1 development tools<text:bookmark-end text:name="__RefHeading___Toc501_2460469384"/></text:h>
      <text:p text:style-name="P21">vscode</text:p>
      <text:p text:style-name="P21"><text:soft-page-break/>maven</text:p>
      <text:p text:style-name="P21">java</text:p>
      <text:p text:style-name="P21">spring and spring ai</text:p>
      <text:p text:style-name="P22">spring initializr</text:p>
      <text:p text:style-name="P23">nvm</text:p>
      <text:p text:style-name="P23">npm</text:p>
      <text:p text:style-name="P23">vue3</text:p>
      <text:p text:style-name="P21"/>
      <text:h text:style-name="Heading_20_2" text:outline-level="2"><text:bookmark-start text:name="__RefHeading___Toc503_2460469384"/>V.2 runtime tools<text:bookmark-end text:name="__RefHeading___Toc503_2460469384"/></text:h>
      <text:p text:style-name="P24">Docker</text:p>
      <text:p text:style-name="P25">docker compose</text:p>
      <text:p text:style-name="P21">postgres/pgvector</text:p>
      <text:p text:style-name="P21">neo4j</text:p>
      <text:p text:style-name="P21">opensearch</text:p>
      <text:p text:style-name="P21">opensearch dashboard</text:p>
      <text:p text:style-name="P21">docling</text:p>
      <text:p text:style-name="P21">temporal</text:p>
      <text:p text:style-name="P21">embeddings model</text:p>
      <text:p text:style-name="P21"/>
      <text:h text:style-name="Heading_20_1" text:outline-level="1"><text:bookmark-start text:name="__RefHeading___Toc505_2460469384"/><text:span text:style-name="T2">VI.<text:tab/></text:span>Starting the pieces<text:bookmark-end text:name="__RefHeading___Toc505_2460469384"/></text:h>
      <text:h text:style-name="Heading_20_1" text:outline-level="1">VI.1 Temporal</text:h>
      <text:p text:style-name="Text_20_body">temporal server start-dev</text:p>
      <text:h text:style-name="Heading_20_2" text:outline-level="2">VI.2<text:tab/>Docling</text:h>
      <text:p text:style-name="P26"/>
      <text:h text:style-name="Heading_20_2" text:outline-level="2"><text:soft-page-break/>VI.3<text:tab/>Pgvector</text:h>
      <text:p text:style-name="P26">docker run -d <text:s text:c="2"/>--name pgvector-db <text:s text:c="2"/>-e POSTGRES_PASSWORD=mysecretpassword <text:s text:c="2"/>-p 5432:5432 <text:s text:c="2"/>pgvector/pgvector:pg17d</text:p>
      <text:h text:style-name="Heading_20_2" text:outline-level="2">VI.4<text:tab/>OpenSearch</text:h>
      <text:p text:style-name="P27"/>
      <text:h text:style-name="Heading_20_1" text:outline-level="1"><text:bookmark-start text:name="__RefHeading___Toc507_2460469384"/><text:span text:style-name="T2">VII.<text:tab/></text:span>Track running <text:span text:style-name="T2">pieces</text:span><text:bookmark-end text:name="__RefHeading___Toc507_2460469384"/></text:h>
      <text:p text:style-name="P17">Docker</text:p>
      <text:p text:style-name="P17">Dock<text:span text:style-name="T16">e</text:span>r compose</text:p>
      <text:p text:style-name="P28">docker logs</text:p>
      <text:p text:style-name="P28">opensearch observability</text:p>
      <text:p text:style-name="P17"/>
      <text:h text:style-name="Heading_20_1" text:outline-level="1"><text:bookmark-start text:name="__RefHeading___Toc509_2460469384"/><text:span text:style-name="T2">VIII.<text:tab/></text:span>Knowledge/info<text:bookmark-end text:name="__RefHeading___Toc509_2460469384"/></text:h>
      <text:p text:style-name="P19">neural networks</text:p>
      <text:p text:style-name="P19">graphs <text:span text:style-name="T12">and analysis</text:span></text:p>
      <text:p text:style-name="P19">cypher-manual</text:p>
      <text:p text:style-name="P19">model training (BERT etc...)</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4</text:page-number><text:s/>/ <text:page-count>6</text:page-count><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3T11:45:05.446825748</meta:creation-date>
    <dc:date>2026-05-16T10:17:54.164710299</dc:date>
    <meta:editing-duration>P6DT21H31M54S</meta:editing-duration>
    <meta:editing-cycles>12</meta:editing-cycles>
    <meta:generator>LibreOffice/26.2.0.3$Linux_X86_64 LibreOffice_project/afbbd0df0edb6d40b450b0337ac646b0913a760c</meta:generator>
    <meta:print-date>2026-05-04T18:26:28.877923080</meta:print-date>
    <meta:printed-by>PDF files</meta:printed-by>
    <meta:document-statistic meta:table-count="0" meta:image-count="0" meta:object-count="0" meta:page-count="6" meta:paragraph-count="116" meta:word-count="742" meta:character-count="4949" meta:non-whitespace-character-count="4295"/>
  </office:meta>
</office:document-meta>
</file>