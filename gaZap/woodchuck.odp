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5.5cm" fo:min-width="27.5cm"/>
    </style:style>
    <style:style style:name="gr2" style:family="graphic" style:parent-style-name="standard">
      <style:graphic-properties draw:stroke="dash" draw:stroke-dash="Long_20_Dash" svg:stroke-linecap="butt" draw:fill="none" draw:textarea-horizontal-align="justify" draw:textarea-vertical-align="middle" draw:auto-grow-height="false" fo:min-height="8.059cm" fo:min-width="20.992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0.648cm" fo:min-width="1.74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45cm" fo:min-width="0.77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648cm" fo:min-width="1.728cm"/>
      <style:paragraph-properties style:writing-mode="lr-tb"/>
    </style:style>
    <style:style style:name="gr7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395cm" fo:min-width="0cm"/>
      <style:paragraph-properties style:writing-mode="lr-tb"/>
    </style:style>
    <style:style style:name="gr10" style:family="graphic" style:parent-style-name="standard">
      <style:graphic-properties draw:stroke="dash" draw:stroke-dash="Long_20_Dash" svg:stroke-linecap="butt" draw:fill="none" draw:textarea-horizontal-align="justify" draw:textarea-vertical-align="middle" draw:auto-grow-height="false" fo:min-height="10.38cm" fo:min-width="17.346cm" draw:shadow="hidden"/>
    </style:style>
    <style:style style:name="gr11" style:family="graphic" style:parent-style-name="standard">
      <style:graphic-properties draw:textarea-horizontal-align="justify" draw:textarea-vertical-align="middle" draw:auto-grow-height="false" fo:min-height="0.648cm" fo:min-width="2.119cm"/>
      <style:paragraph-properties style:writing-mode="lr-tb"/>
    </style:style>
    <style:style style:name="gr12" style:family="graphic" style:parent-style-name="standard">
      <style:graphic-properties draw:stroke="dash" draw:stroke-dash="Long_20_Dash" svg:stroke-linecap="butt" draw:fill="none" draw:textarea-horizontal-align="justify" draw:textarea-vertical-align="middle" draw:auto-grow-height="false" fo:min-height="10.38cm" fo:min-width="3.84cm" draw:shadow="hidden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9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1.492cm" svg:height="8.309cm" svg:x="3.133cm" svg:y="4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5cm" svg:height="1.27cm" svg:x="8.21cm" svg:y="5.214cm">
          <text:p text:style-name="P3"><text:span text:style-name="T1">keycloa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175cm" svg:height="1.27cm" svg:x="8.21cm" svg:y="9.415cm">
          <text:p text:style-name="P3"><text:span text:style-name="T1">API</text:span></text:p>
          <text:p text:style-name="P3"><text:span text:style-name="T1">gatew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175cm" svg:height="1.27cm" svg:x="8.21cm" svg:y="5.215cm">
          <text:p text:style-name="P3"><text:span text:style-name="T1">keycloa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175cm" svg:height="1.27cm" svg:x="3.41cm" svg:y="9.415cm">
          <text:p text:style-name="P3"><text:span text:style-name="T1">u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27cm" svg:height="1.27cm" svg:x="12.543cm" svg:y="5.2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2" draw:layer="layout" svg:x1="11.385cm" svg:y1="5.849cm" svg:x2="12.543cm" svg:y2="5.849cm">
          <text:p/>
        </draw:line>
        <draw:line draw:style-name="gr5" draw:text-style-name="P2" draw:layer="layout" svg:x1="5.715cm" svg:y1="9.415cm" svg:x2="8.402cm" svg:y2="6.154cm">
          <text:p/>
        </draw:line>
        <draw:line draw:style-name="gr5" draw:text-style-name="P2" draw:layer="layout" svg:x1="6.585cm" svg:y1="10.05cm" svg:x2="8.21cm" svg:y2="10.05cm">
          <text:p/>
        </draw:line>
        <draw:line draw:style-name="gr5" draw:text-style-name="P2" draw:layer="layout" svg:x1="9.825cm" svg:y1="9.415cm" svg:x2="9.825cm" svg:y2="6.485cm">
          <text:p/>
        </draw:line>
        <draw:custom-shape draw:style-name="gr6" draw:text-style-name="P3" draw:layer="layout" svg:width="3.15cm" svg:height="1.27cm" svg:x="13.97cm" svg:y="7.715cm">
          <text:p text:style-name="P3"><text:span text:style-name="T1">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4.205cm" svg:y1="8.015cm" svg:x2="14.205cm" svg:y2="8.65cm">
          <text:p/>
        </draw:line>
        <draw:custom-shape draw:style-name="gr6" draw:text-style-name="P3" draw:layer="layout" svg:width="3.15cm" svg:height="1.27cm" svg:x="13.971cm" svg:y="9.416cm">
          <text:p text:style-name="P3"><text:span text:style-name="T1">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4.206cm" svg:y1="9.716cm" svg:x2="14.206cm" svg:y2="10.351cm">
          <text:p/>
        </draw:line>
        <draw:custom-shape draw:style-name="gr6" draw:text-style-name="P3" draw:layer="layout" svg:width="3.15cm" svg:height="1.27cm" svg:x="13.971cm" svg:y="11.116cm">
          <text:p text:style-name="P3"><text:span text:style-name="T1">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4.206cm" svg:y1="11.416cm" svg:x2="14.206cm" svg:y2="12.051cm">
          <text:p/>
        </draw:line>
        <draw:line draw:style-name="gr5" draw:text-style-name="P2" draw:layer="layout" svg:x1="13.971cm" svg:y1="10.055cm" svg:x2="11.385cm" svg:y2="10.055cm">
          <text:p/>
        </draw:line>
        <draw:frame draw:style-name="gr8" draw:text-style-name="P6" draw:layer="layout" svg:width="2.881cm" svg:height="1.039cm" svg:x="8.255cm" svg:y="7.16cm">
          <draw:text-box>
            <text:p text:style-name="P5"><text:span text:style-name="T2">Spring Security</text:span></text:p>
            <text:p text:style-name="P5"><text:span text:style-name="T2">OAuth2</text:span></text:p>
          </draw:text-box>
        </draw:frame>
        <draw:line draw:style-name="gr5" draw:text-style-name="P2" draw:layer="layout" svg:x1="10.795cm" svg:y1="9.62cm" svg:x2="13.97cm" svg:y2="8.35cm">
          <text:p/>
        </draw:line>
        <draw:line draw:style-name="gr5" draw:text-style-name="P2" draw:layer="layout" svg:x1="10.795cm" svg:y1="10.685cm" svg:x2="13.971cm" svg:y2="11.725cm">
          <text:p/>
        </draw:line>
        <draw:frame draw:style-name="gr9" draw:text-style-name="P6" draw:layer="layout" svg:width="1.205cm" svg:height="0.645cm" svg:x="11.256cm" svg:y="5.258cm">
          <draw:text-box>
            <text:p text:style-name="P5"><text:span text:style-name="T2">SQL</text:span></text:p>
          </draw:text-box>
        </draw:frame>
        <draw:custom-shape draw:style-name="gr4" draw:text-style-name="P4" draw:layer="layout" svg:width="1.27cm" svg:height="1.27cm" svg:x="18.245cm" svg:y="7.77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2" draw:layer="layout" svg:x1="17.087cm" svg:y1="8.351cm" svg:x2="18.245cm" svg:y2="8.351cm">
          <text:p/>
        </draw:line>
        <draw:frame draw:style-name="gr8" draw:text-style-name="P6" draw:layer="layout" svg:width="1.205cm" svg:height="0.645cm" svg:x="16.958cm" svg:y="7.76cm">
          <draw:text-box>
            <text:p text:style-name="P5"><text:span text:style-name="T2">SQL</text:span></text:p>
          </draw:text-box>
        </draw:frame>
        <draw:custom-shape draw:style-name="gr4" draw:text-style-name="P4" draw:layer="layout" svg:width="1.27cm" svg:height="1.27cm" svg:x="18.247cm" svg:y="9.47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2" draw:layer="layout" svg:x1="17.089cm" svg:y1="10.053cm" svg:x2="18.247cm" svg:y2="10.053cm">
          <text:p/>
        </draw:line>
        <draw:frame draw:style-name="gr8" draw:text-style-name="P6" draw:layer="layout" svg:width="1.205cm" svg:height="0.645cm" svg:x="16.96cm" svg:y="9.462cm">
          <draw:text-box>
            <text:p text:style-name="P5"><text:span text:style-name="T2">SQL</text:span></text:p>
          </draw:text-box>
        </draw:frame>
        <draw:custom-shape draw:style-name="gr3" draw:text-style-name="P3" draw:layer="layout" svg:width="3.175cm" svg:height="1.27cm" svg:x="21.01cm" svg:y="9.516cm">
          <text:p text:style-name="P3"><text:span text:style-name="T1">kaf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6.69cm" svg:y1="8.796cm" svg:x2="21.203cm" svg:y2="9.816cm">
          <text:p/>
        </draw:line>
        <draw:frame draw:style-name="gr8" draw:text-style-name="P6" draw:layer="layout" svg:width="1.751cm" svg:height="0.645cm" svg:x="19.839cm" svg:y="9.171cm">
          <draw:text-box>
            <text:p text:style-name="P5"><text:span text:style-name="T2">pub</text:span><text:span text:style-name="T2">/</text:span><text:span text:style-name="T2">sub</text:span></text:p>
          </draw:text-box>
        </draw:frame>
        <draw:line draw:style-name="gr5" draw:text-style-name="P2" draw:layer="layout" svg:x1="16.769cm" svg:y1="10.461cm" svg:x2="19.05cm" svg:y2="11.525cm">
          <text:p/>
        </draw:line>
        <draw:line draw:style-name="gr5" draw:text-style-name="P2" draw:layer="layout" svg:x1="21.01cm" svg:y1="10.255cm" svg:x2="19.05cm" svg:y2="11.525cm">
          <text:p/>
        </draw:line>
        <draw:line draw:style-name="gr5" draw:text-style-name="P2" draw:layer="layout" svg:x1="19.05cm" svg:y1="12.16cm" svg:x2="21.298cm" svg:y2="10.563cm">
          <text:p/>
        </draw:line>
        <draw:line draw:style-name="gr5" draw:text-style-name="P2" draw:layer="layout" svg:x1="16.51cm" svg:y1="12.16cm" svg:x2="19.05cm" svg:y2="12.16cm">
          <text:p/>
        </draw:line>
        <draw:frame draw:style-name="gr8" draw:text-style-name="P6" draw:layer="layout" svg:width="1.751cm" svg:height="0.645cm" svg:x="19.839cm" svg:y="10.971cm">
          <draw:text-box>
            <text:p text:style-name="P5"><text:span text:style-name="T2">p</text:span><text:span text:style-name="T2">u</text:span><text:span text:style-name="T2">b</text:span><text:span text:style-name="T2">/</text:span><text:span text:style-name="T2">s</text:span><text:span text:style-name="T2">u</text:span><text:span text:style-name="T2">b</text:span></text:p>
          </draw:text-box>
        </draw:frame>
        <draw:custom-shape draw:style-name="gr3" draw:text-style-name="P3" draw:layer="layout" svg:width="3.175cm" svg:height="1.27cm" svg:x="14.01cm" svg:y="2.816cm">
          <text:p text:style-name="P3"><text:span text:style-name="T1">pay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5.527cm" svg:y1="7.715cm" svg:x2="15.527cm" svg:y2="4.086cm">
          <text:p/>
        </draw:line>
        <draw:custom-shape draw:style-name="gr10" draw:text-style-name="P2" draw:layer="layout" svg:width="17.846cm" svg:height="10.63cm" draw:transform="skewX (-0.00244346095279206) rotate (-0.00244346095279215) translate (7.336cm 4.486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703cm" svg:height="1.27cm" svg:x="17.835cm" svg:y="13.461cm">
          <text:p text:style-name="P3"><text:span text:style-name="T1">Test</text:span></text:p>
          <text:p text:style-name="P3"><text:span text:style-name="T1">contai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438cm" svg:height="0.645cm" svg:x="11.657cm" svg:y="8.459cm">
          <draw:text-box>
            <text:p text:style-name="P5"><text:span text:style-name="T2">REST</text:span></text:p>
          </draw:text-box>
        </draw:frame>
        <draw:frame draw:style-name="gr8" draw:text-style-name="P6" draw:layer="layout" svg:width="1.438cm" svg:height="0.645cm" svg:x="11.657cm" svg:y="9.56cm">
          <draw:text-box>
            <text:p text:style-name="P5"><text:span text:style-name="T2">REST</text:span></text:p>
          </draw:text-box>
        </draw:frame>
        <draw:frame draw:style-name="gr8" draw:text-style-name="P6" draw:layer="layout" svg:width="1.438cm" svg:height="0.645cm" svg:x="11.657cm" svg:y="10.561cm">
          <draw:text-box>
            <text:p text:style-name="P5"><text:span text:style-name="T2">REST</text:span></text:p>
          </draw:text-box>
        </draw:frame>
        <draw:frame draw:style-name="gr8" draw:text-style-name="P6" draw:layer="layout" svg:width="1.438cm" svg:height="0.645cm" svg:x="6.657cm" svg:y="9.561cm">
          <draw:text-box>
            <text:p text:style-name="P5"><text:span text:style-name="T2">REST</text:span></text:p>
          </draw:text-box>
        </draw:frame>
        <draw:frame draw:style-name="gr8" draw:text-style-name="P6" draw:layer="layout" svg:width="2.331cm" svg:height="0.645cm" svg:x="11.657cm" svg:y="14.361cm">
          <draw:text-box>
            <text:p text:style-name="P5"><text:span text:style-name="T2">Spring Boot</text:span></text:p>
          </draw:text-box>
        </draw:frame>
        <draw:frame draw:style-name="gr8" draw:text-style-name="P6" draw:layer="layout" svg:width="1.438cm" svg:height="0.645cm" svg:x="11.657cm" svg:y="9.561cm">
          <draw:text-box>
            <text:p text:style-name="P5"><text:span text:style-name="T2">REST</text:span></text:p>
          </draw:text-box>
        </draw:frame>
        <draw:frame draw:style-name="gr8" draw:text-style-name="P6" draw:layer="layout" svg:width="2.178cm" svg:height="0.645cm" svg:x="10.257cm" svg:y="12.261cm">
          <draw:text-box>
            <text:p text:style-name="P5"><text:span text:style-name="T2">Kubenetes</text:span></text:p>
          </draw:text-box>
        </draw:frame>
        <draw:frame draw:style-name="gr8" draw:text-style-name="P8" draw:layer="layout" svg:width="11.488cm" svg:height="1.673cm" svg:x="1.538cm" svg:y="0.924cm">
          <draw:text-box>
            <text:p text:style-name="P7"><text:span text:style-name="T1">Blueprint – </text:span><text:span text:style-name="T1"><text:a xlink:href="https://github.com/barthr/spring-boot-blueprint" xlink:type="simple">https://github.com/barthr/spring-boot-blueprint</text:a></text:span><text:span text:style-name="T1"><text:s text:c="2"/></text:span></text:p>
            <text:p text:style-name="P7"><text:span text:style-name="T1">Initializr <text:s text:c="3"/>- https://start.spring.io </text:span></text:p>
            <text:p text:style-name="P7"><text:span text:style-name="T1">Download - TBD</text:span></text:p>
          </draw:text-box>
        </draw:frame>
        <draw:custom-shape draw:style-name="gr12" draw:text-style-name="P2" draw:layer="layout" svg:width="4.34cm" svg:height="10.63cm" draw:transform="skewX (-0.00244346095279206) rotate (-0.00244346095279215) translate (2.836cm 4.486cm)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306cm" svg:height="0.645cm" svg:x="4.258cm" svg:y="14.362cm">
          <draw:text-box>
            <text:p text:style-name="P5"><text:span text:style-name="T2">Vue3</text:span></text:p>
          </draw:text-box>
        </draw:frame>
        <draw:frame draw:style-name="gr8" draw:text-style-name="P6" draw:layer="layout" svg:width="1.831cm" svg:height="0.645cm" svg:x="12.699cm" svg:y="7.54cm">
          <draw:text-box>
            <text:p text:style-name="P5"><text:span text:style-name="T2">swagge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2-13T16:16:31.381183269</meta:creation-date>
    <dc:date>2026-02-13T17:40:53.960189692</dc:date>
    <meta:editing-duration>PT40M47S</meta:editing-duration>
    <meta:editing-cycles>4</meta:editing-cycles>
    <meta:generator>LibreOffice/7.3.6.2$Linux_X86_64 LibreOffice_project/30$Build-2</meta:generator>
    <meta:document-statistic meta:object-count="74"/>
  </office:meta>
</office:document-meta>
</file>