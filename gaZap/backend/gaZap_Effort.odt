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611d0" officeooo:paragraph-rsid="00058af3" style:font-weight-asian="bold" style:font-weight-complex="bold"/>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text-properties fo:font-weight="bold" officeooo:rsid="00058af3" officeooo:paragraph-rsid="00058af3" style:font-weight-asian="bold" style:font-weight-complex="bold"/>
    </style:style>
    <style:style style:name="P7" style:family="paragraph" style:parent-style-name="Heading_20_1">
      <style:paragraph-properties fo:break-before="page"/>
    </style:style>
    <style:style style:name="P8" style:family="paragraph" style:parent-style-name="Text_20_body">
      <style:text-properties fo:font-weight="normal" officeooo:rsid="000611d0" officeooo:paragraph-rsid="000611d0" style:font-weight-asian="normal" style:font-weight-complex="normal"/>
    </style:style>
    <style:style style:name="P9" style:family="paragraph" style:parent-style-name="Text_20_body">
      <style:text-properties fo:font-weight="normal" officeooo:rsid="0007f265" officeooo:paragraph-rsid="0007f265" style:font-weight-asian="normal" style:font-weight-complex="normal"/>
    </style:style>
    <style:style style:name="P10" style:family="paragraph" style:parent-style-name="Text_20_body">
      <style:text-properties fo:font-weight="normal" officeooo:rsid="00087ca6" officeooo:paragraph-rsid="00087ca6" style:font-weight-asian="normal" style:font-weight-complex="normal"/>
    </style:style>
    <style:style style:name="P11" style:family="paragraph" style:parent-style-name="Text_20_body">
      <style:text-properties fo:font-weight="normal" officeooo:rsid="00090489" officeooo:paragraph-rsid="00090489" style:font-weight-asian="normal" style:font-weight-complex="normal"/>
    </style:style>
    <style:style style:name="P12" style:family="paragraph" style:parent-style-name="Text_20_body">
      <style:text-properties officeooo:rsid="0001402c" officeooo:paragraph-rsid="0001402c"/>
    </style:style>
    <style:style style:name="P13" style:family="paragraph" style:parent-style-name="Text_20_body">
      <style:text-properties officeooo:rsid="00050fce" officeooo:paragraph-rsid="00050fce"/>
    </style:style>
    <style:style style:name="P14" style:family="paragraph" style:parent-style-name="Text_20_body">
      <style:text-properties officeooo:rsid="00058af3" officeooo:paragraph-rsid="00058af3"/>
    </style:style>
    <style:style style:name="P15" style:family="paragraph" style:parent-style-name="Text_20_body">
      <style:text-properties officeooo:paragraph-rsid="0007f265"/>
    </style:style>
    <style:style style:name="P16" style:family="paragraph" style:parent-style-name="Text_20_body">
      <style:text-properties fo:font-weight="normal" officeooo:rsid="00089ba9" officeooo:paragraph-rsid="00089ba9" style:font-weight-asian="normal" style:font-weight-complex="normal"/>
    </style:style>
    <style:style style:name="P17" style:family="paragraph" style:parent-style-name="Text_20_body">
      <style:text-properties fo:font-weight="normal" officeooo:rsid="001304ef" officeooo:paragraph-rsid="001304ef" style:font-weight-asian="normal" style:font-weight-complex="normal"/>
    </style:style>
    <style:style style:name="P18" style:family="paragraph" style:parent-style-name="Text_20_body">
      <style:text-properties fo:font-weight="normal" officeooo:rsid="000ddca3" officeooo:paragraph-rsid="000ddca3" style:font-weight-asian="normal" style:font-weight-complex="normal"/>
    </style:style>
    <style:style style:name="P19" style:family="paragraph" style:parent-style-name="Text_20_body">
      <style:text-properties fo:font-weight="normal" officeooo:rsid="00089ba9" officeooo:paragraph-rsid="00115b91" style:font-weight-asian="normal" style:font-weight-complex="normal"/>
    </style:style>
    <style:style style:name="P20" style:family="paragraph" style:parent-style-name="Text_20_body">
      <style:text-properties fo:font-weight="normal" officeooo:rsid="00115b91" officeooo:paragraph-rsid="00115b91" style:font-weight-asian="normal" style:font-weight-complex="normal"/>
    </style:style>
    <style:style style:name="P21" style:family="paragraph" style:parent-style-name="Text_20_body">
      <style:text-properties officeooo:rsid="00115b91" officeooo:paragraph-rsid="00115b91"/>
    </style:style>
    <style:style style:name="P22" style:family="paragraph" style:parent-style-name="Text_20_body">
      <style:text-properties fo:font-weight="bold" officeooo:rsid="00058af3" officeooo:paragraph-rsid="000611d0" style:font-weight-asian="bold" style:font-weight-complex="bold"/>
    </style:style>
    <style:style style:name="P23" style:family="paragraph" style:parent-style-name="Text_20_body">
      <style:text-properties officeooo:rsid="00089ba9" officeooo:paragraph-rsid="00089ba9"/>
    </style:style>
    <style:style style:name="T1" style:family="text">
      <style:text-properties officeooo:rsid="00050fce"/>
    </style:style>
    <style:style style:name="T2" style:family="text">
      <style:text-properties officeooo:rsid="000611d0"/>
    </style:style>
    <style:style style:name="T3" style:family="text">
      <style:text-properties officeooo:rsid="000abe0a"/>
    </style:style>
    <style:style style:name="T4" style:family="text">
      <style:text-properties officeooo:rsid="000f426c"/>
    </style:style>
    <style:style style:name="T5" style:family="text">
      <style:text-properties officeooo:rsid="0007f265"/>
    </style:style>
    <style:style style:name="T6" style:family="text">
      <style:text-properties officeooo:rsid="00058af3"/>
    </style:style>
    <style:style style:name="T7" style:family="text">
      <style:text-properties officeooo:rsid="00102dae"/>
    </style:style>
    <style:style style:name="T8" style:family="text">
      <style:text-properties officeooo:rsid="0002363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3_2460469384" office:name="I. Introduction" text:style-name="Index_20_Link" text:visited-style-name="Index_20_Link">I. Introduction<text:tab/>2</text:a></text:p>
          <text:p text:style-name="P3"><text:a xlink:type="simple" xlink:href="#__RefHeading___Toc315_2460469384" office:name="II. Domains of study (applied gaZap)" text:style-name="Index_20_Link" text:visited-style-name="Index_20_Link">II. Domains of study (applied gaZap)<text:tab/>2</text:a></text:p>
          <text:p text:style-name="P3"><text:a xlink:type="simple" xlink:href="#__RefHeading___Toc317_2460469384" office:name="III. gaZap – a tool for domain studies" text:style-name="Index_20_Link" text:visited-style-name="Index_20_Link">III. gaZap – a tool for domain studies<text:tab/>2</text:a></text:p>
          <text:p text:style-name="P3"><text:a xlink:type="simple" xlink:href="#__RefHeading___Toc471_2460469384" office:name="IV. Technology applied to gaZap" text:style-name="Index_20_Link" text:visited-style-name="Index_20_Link">IV. Technology applied to gaZap<text:tab/>2</text:a></text:p>
          <text:p text:style-name="P4"><text:a xlink:type="simple" xlink:href="#__RefHeading___Toc473_2460469384" office:name="IV.1. Spring" text:style-name="Index_20_Link" text:visited-style-name="Index_20_Link">IV.1. Spring<text:tab/>2</text:a></text:p>
          <text:p text:style-name="P5"><text:a xlink:type="simple" xlink:href="#__RefHeading___Toc475_2460469384" office:name="IV.1.a RestController/swagger" text:style-name="Index_20_Link" text:visited-style-name="Index_20_Link">IV.1.a RestController/swagger<text:tab/>2</text:a></text:p>
          <text:p text:style-name="P5"><text:a xlink:type="simple" xlink:href="#__RefHeading___Toc477_2460469384" office:name="IV.1.b Service" text:style-name="Index_20_Link" text:visited-style-name="Index_20_Link">IV.1.b Service<text:tab/>2</text:a></text:p>
          <text:p text:style-name="P5"><text:a xlink:type="simple" xlink:href="#__RefHeading___Toc479_2460469384" office:name="IV.1.c Annotation" text:style-name="Index_20_Link" text:visited-style-name="Index_20_Link">IV.1.c Annotation<text:tab/>2</text:a></text:p>
          <text:p text:style-name="P4"><text:a xlink:type="simple" xlink:href="#__RefHeading___Toc481_2460469384" office:name="IV.2 Temporal" text:style-name="Index_20_Link" text:visited-style-name="Index_20_Link">IV.2 Temporal<text:tab/>2</text:a></text:p>
          <text:p text:style-name="P4"><text:a xlink:type="simple" xlink:href="#__RefHeading___Toc483_2460469384" office:name="IV.3 Docling" text:style-name="Index_20_Link" text:visited-style-name="Index_20_Link">IV.3 Docling<text:tab/>2</text:a></text:p>
          <text:p text:style-name="P4"><text:a xlink:type="simple" xlink:href="#__RefHeading___Toc485_2460469384" office:name="IV.4 Embeddings models" text:style-name="Index_20_Link" text:visited-style-name="Index_20_Link">IV.4 Embeddings models<text:tab/>3</text:a></text:p>
          <text:p text:style-name="P5"><text:a xlink:type="simple" xlink:href="#__RefHeading___Toc487_2460469384" office:name="IV.4.a OpenAI" text:style-name="Index_20_Link" text:visited-style-name="Index_20_Link">IV.4.a OpenAI<text:tab/>3</text:a></text:p>
          <text:p text:style-name="P5"><text:a xlink:type="simple" xlink:href="#__RefHeading___Toc489_2460469384" office:name="IV.4.b Ollama" text:style-name="Index_20_Link" text:visited-style-name="Index_20_Link">IV.4.b Ollama<text:tab/>3</text:a></text:p>
          <text:p text:style-name="P4"><text:a xlink:type="simple" xlink:href="#__RefHeading___Toc491_2460469384" office:name="IV.5 Vector stores" text:style-name="Index_20_Link" text:visited-style-name="Index_20_Link">IV.5 Vector stores<text:tab/>3</text:a></text:p>
          <text:p text:style-name="P5"><text:a xlink:type="simple" xlink:href="#__RefHeading___Toc5229_2460469384" office:name="IV.5.a Postgres/pgvector" text:style-name="Index_20_Link" text:visited-style-name="Index_20_Link">IV.5.a Postgres/pgvector<text:tab/>3</text:a></text:p>
          <text:p text:style-name="P5"><text:a xlink:type="simple" xlink:href="#__RefHeading___Toc5231_2460469384" office:name="IV.5.b OpenSearch" text:style-name="Index_20_Link" text:visited-style-name="Index_20_Link">IV.5.b OpenSearch<text:tab/>3</text:a></text:p>
          <text:p text:style-name="P5"><text:a xlink:type="simple" xlink:href="#__RefHeading___Toc5233_2460469384" office:name="IV.5.c Redis" text:style-name="Index_20_Link" text:visited-style-name="Index_20_Link">IV.5.c Redis<text:tab/>3</text:a></text:p>
          <text:p text:style-name="P5"><text:a xlink:type="simple" xlink:href="#__RefHeading___Toc5235_2460469384" office:name="IV.5.d Neo4j" text:style-name="Index_20_Link" text:visited-style-name="Index_20_Link">IV.5.d Neo4j<text:tab/>3</text:a></text:p>
          <text:p text:style-name="P4"><text:a xlink:type="simple" xlink:href="#__RefHeading___Toc493_2460469384" office:name="IV.6 Observability" text:style-name="Index_20_Link" text:visited-style-name="Index_20_Link">IV.6 Observability<text:tab/>3</text:a></text:p>
          <text:p text:style-name="P5"><text:a xlink:type="simple" xlink:href="#__RefHeading___Toc495_2460469384" office:name="IV.6.a micrometer" text:style-name="Index_20_Link" text:visited-style-name="Index_20_Link">IV.6.a micrometer<text:tab/>3</text:a></text:p>
          <text:p text:style-name="P5"><text:a xlink:type="simple" xlink:href="#__RefHeading___Toc497_2460469384" office:name="IV.6.b opensearch" text:style-name="Index_20_Link" text:visited-style-name="Index_20_Link">IV.6.b opensearch<text:tab/>3</text:a></text:p>
          <text:p text:style-name="P4"><text:a xlink:type="simple" xlink:href="#__RefHeading___Toc2475_2460469384" office:name="IV.7 User Interface" text:style-name="Index_20_Link" text:visited-style-name="Index_20_Link">IV.7 User Interface<text:tab/>3</text:a></text:p>
          <text:p text:style-name="P5"><text:a xlink:type="simple" xlink:href="#__RefHeading___Toc2477_2460469384" office:name="IV.7.a Vue3" text:style-name="Index_20_Link" text:visited-style-name="Index_20_Link">IV.7.a Vue3<text:tab/>3</text:a></text:p>
          <text:p text:style-name="P3"><text:a xlink:type="simple" xlink:href="#__RefHeading___Toc499_2460469384" office:name="V. Getting the pieces" text:style-name="Index_20_Link" text:visited-style-name="Index_20_Link">V. Getting the pieces<text:tab/>4</text:a></text:p>
          <text:p text:style-name="P4"><text:a xlink:type="simple" xlink:href="#__RefHeading___Toc501_2460469384" office:name="V.1 development tools" text:style-name="Index_20_Link" text:visited-style-name="Index_20_Link">V.1 development tools<text:tab/>4</text:a></text:p>
          <text:p text:style-name="P4"><text:a xlink:type="simple" xlink:href="#__RefHeading___Toc503_2460469384" office:name="V.2 runtime tools" text:style-name="Index_20_Link" text:visited-style-name="Index_20_Link">V.2 runtime tools<text:tab/>4</text:a></text:p>
          <text:p text:style-name="P3"><text:a xlink:type="simple" xlink:href="#__RefHeading___Toc505_2460469384" office:name="VI. Starting the pieces" text:style-name="Index_20_Link" text:visited-style-name="Index_20_Link">VI. Starting the pieces<text:tab/>4</text:a></text:p>
          <text:p text:style-name="P3"><text:a xlink:type="simple" xlink:href="#__RefHeading___Toc507_2460469384" office:name="VII. Track running pieces" text:style-name="Index_20_Link" text:visited-style-name="Index_20_Link">VII. Track running pieces<text:tab/>4</text:a></text:p>
          <text:p text:style-name="P3"><text:a xlink:type="simple" xlink:href="#__RefHeading___Toc509_2460469384" office:name="VIII. Knowledge/info" text:style-name="Index_20_Link" text:visited-style-name="Index_20_Link">VIII. Knowledge/info<text:tab/>5</text:a></text:p>
        </text:index-body>
      </text:table-of-content>
      <text:p text:style-name="P6"/>
      <text:p text:style-name="P6"/>
      <text:h text:style-name="P7" text:outline-level="1"><text:bookmark-start text:name="__RefHeading___Toc313_2460469384"/><text:span text:style-name="T2">I.<text:tab/></text:span>Introduction<text:bookmark-end text:name="__RefHeading___Toc313_2460469384"/></text:h>
      <text:p text:style-name="P8">partly a cheat sheet, a how to, and pointers to information</text:p>
      <text:p text:style-name="P8"/>
      <text:h text:style-name="Heading_20_1" text:outline-level="1"><text:bookmark-start text:name="__RefHeading___Toc315_2460469384"/><text:span text:style-name="T2">II.<text:tab/></text:span>Domains of study <text:span text:style-name="T2">(applied gaZap)</text:span><text:bookmark-end text:name="__RefHeading___Toc315_2460469384"/></text:h>
      <text:p text:style-name="P9">explanations of using gaZap (how <text:span text:style-name="T3">and why</text:span>)</text:p>
      <text:p text:style-name="P10">ex materials research</text:p>
      <text:p text:style-name="P10">ex citations</text:p>
      <text:p text:style-name="P11">ex data organization</text:p>
      <text:p text:style-name="P11"/>
      <text:h text:style-name="Heading_20_1" text:outline-level="1"><text:bookmark-start text:name="__RefHeading___Toc317_2460469384"/><text:span text:style-name="T2">III.<text:tab/></text:span>gaZap – a tool for domain studies<text:bookmark-end text:name="__RefHeading___Toc317_2460469384"/></text:h>
      <text:p text:style-name="P9">explanations of what</text:p>
      <text:p text:style-name="P9"/>
      <text:h text:style-name="Heading_20_1" text:outline-level="1"><text:bookmark-start text:name="__RefHeading___Toc471_2460469384"/><text:span text:style-name="T2">IV.<text:tab/></text:span>Technology <text:span text:style-name="T4">applied to gaZap</text:span><text:bookmark-end text:name="__RefHeading___Toc471_2460469384"/></text:h>
      <text:h text:style-name="Heading_20_2" text:outline-level="2"><text:bookmark-start text:name="__RefHeading___Toc473_2460469384"/><text:span text:style-name="T2">IV.1.<text:tab/></text:span>Spring<text:bookmark-end text:name="__RefHeading___Toc473_2460469384"/></text:h>
      <text:h text:style-name="Heading_20_3" text:outline-level="3"><text:bookmark-start text:name="__RefHeading___Toc475_2460469384"/><text:span text:style-name="T2">IV.1.a<text:tab/><text:tab/></text:span>RestController/<text:span text:style-name="T5">swagger</text:span><text:bookmark-end text:name="__RefHeading___Toc475_2460469384"/></text:h>
      <text:h text:style-name="Heading_20_3" text:outline-level="3"><text:bookmark-start text:name="__RefHeading___Toc477_2460469384"/><text:span text:style-name="T2">IV.1.b</text:span><text:tab/>Service<text:bookmark-end text:name="__RefHeading___Toc477_2460469384"/></text:h>
      <text:h text:style-name="Heading_20_3" text:outline-level="3"><text:bookmark-start text:name="__RefHeading___Toc479_2460469384"/><text:span text:style-name="T2">IV.1.c<text:tab/><text:tab/></text:span>Annotation<text:bookmark-end text:name="__RefHeading___Toc479_2460469384"/></text:h>
      <text:p text:style-name="P12">&lt;document more stuff&gt;</text:p>
      <text:h text:style-name="Heading_20_2" text:outline-level="2"/>
      <text:h text:style-name="Heading_20_2" text:outline-level="2"><text:bookmark-start text:name="__RefHeading___Toc481_2460469384"/><text:span text:style-name="T2">IV.2<text:tab/></text:span>Temporal<text:bookmark-end text:name="__RefHeading___Toc481_2460469384"/></text:h>
      <text:p text:style-name="P12">&lt;document&gt;</text:p>
      <text:h text:style-name="Heading_20_2" text:outline-level="2"><text:bookmark-start text:name="__RefHeading___Toc483_2460469384"/><text:span text:style-name="T2">IV.3<text:tab/></text:span>Docling<text:bookmark-end text:name="__RefHeading___Toc483_2460469384"/></text:h>
      <text:p text:style-name="P12">&lt;document&gt;</text:p>
      <text:h text:style-name="Heading_20_2" text:outline-level="2"><text:bookmark-start text:name="__RefHeading___Toc485_2460469384"/><text:soft-page-break/><text:span text:style-name="T2">IV.4<text:tab/></text:span>Embedd<text:span text:style-name="T6">ings </text:span>model<text:span text:style-name="T6">s</text:span><text:bookmark-end text:name="__RefHeading___Toc485_2460469384"/></text:h>
      <text:h text:style-name="Heading_20_3" text:outline-level="3"><text:bookmark-start text:name="__RefHeading___Toc487_2460469384"/><text:span text:style-name="T2">IV.4.a</text:span><text:tab/><text:tab/>OpenAI<text:bookmark-end text:name="__RefHeading___Toc487_2460469384"/></text:h>
      <text:p text:style-name="P13"><text:tab/><text:tab/>no download. Must run on internet</text:p>
      <text:h text:style-name="Heading_20_3" text:outline-level="3"><text:bookmark-start text:name="__RefHeading___Toc489_2460469384"/><text:span text:style-name="T2">IV.4.b</text:span><text:tab/>Ollama<text:bookmark-end text:name="__RefHeading___Toc489_2460469384"/></text:h>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h text:style-name="Heading_20_3" text:outline-level="3"/>
      <text:h text:style-name="Heading_20_2" text:outline-level="2"><text:bookmark-start text:name="__RefHeading___Toc491_2460469384"/><text:span text:style-name="T2">IV.5<text:tab/></text:span>Vector stores<text:bookmark-end text:name="__RefHeading___Toc491_2460469384"/></text:h>
      <text:h text:style-name="Heading_20_3" text:outline-level="3"><text:bookmark-start text:name="__RefHeading___Toc5229_2460469384"/><text:span text:style-name="T7">IV.5.a<text:tab/><text:tab/></text:span>Postgres/<text:span text:style-name="T6">pgvector</text:span><text:bookmark-end text:name="__RefHeading___Toc5229_2460469384"/></text:h>
      <text:h text:style-name="Heading_20_3" text:outline-level="3"><text:bookmark-start text:name="__RefHeading___Toc5231_2460469384"/><text:span text:style-name="T7">IV.5.b<text:tab/></text:span>OpenSearch<text:bookmark-end text:name="__RefHeading___Toc5231_2460469384"/></text:h>
      <text:h text:style-name="Heading_20_3" text:outline-level="3"><text:bookmark-start text:name="__RefHeading___Toc5233_2460469384"/><text:span text:style-name="T7">IV.5.c</text:span><text:tab/><text:tab/>Redis<text:bookmark-end text:name="__RefHeading___Toc5233_2460469384"/></text:h>
      <text:h text:style-name="Heading_20_3" text:outline-level="3"><text:bookmark-start text:name="__RefHeading___Toc5235_2460469384"/><text:span text:style-name="T7">IV.5.d</text:span><text:tab/>Neo4j<text:bookmark-end text:name="__RefHeading___Toc5235_2460469384"/></text:h>
      <text:p text:style-name="P14"/>
      <text:h text:style-name="Heading_20_2" text:outline-level="2"><text:bookmark-start text:name="__RefHeading___Toc493_2460469384"/>IV.6<text:tab/>Observability<text:bookmark-end text:name="__RefHeading___Toc493_2460469384"/></text:h>
      <text:h text:style-name="Heading_20_3" text:outline-level="3"><text:bookmark-start text:name="__RefHeading___Toc495_2460469384"/>IV.6.a<text:tab/><text:tab/>micrometer<text:bookmark-end text:name="__RefHeading___Toc495_2460469384"/></text:h>
      <text:h text:style-name="Heading_20_3" text:outline-level="3"><text:bookmark-start text:name="__RefHeading___Toc497_2460469384"/>IV.6.b<text:tab/>opensearch<text:bookmark-end text:name="__RefHeading___Toc497_2460469384"/></text:h>
      <text:p text:style-name="Text_20_body"/>
      <text:h text:style-name="Heading_20_2" text:outline-level="2"><text:bookmark-start text:name="__RefHeading___Toc2475_2460469384"/><text:span text:style-name="T4">I</text:span>V.<text:span text:style-name="T4">7</text:span><text:tab/>User Interface<text:bookmark-end text:name="__RefHeading___Toc2475_2460469384"/></text:h>
      <text:h text:style-name="Heading_20_3" text:outline-level="3"><text:bookmark-start text:name="__RefHeading___Toc2477_2460469384"/><text:span text:style-name="T4">I</text:span>V.<text:span text:style-name="T4">7.a</text:span><text:tab/><text:tab/>Vue3<text:bookmark-end text:name="__RefHeading___Toc2477_2460469384"/></text:h>
      <text:p text:style-name="P15"/>
      <text:h text:style-name="Heading_20_1" text:outline-level="1"><text:bookmark-start text:name="__RefHeading___Toc499_2460469384"/><text:soft-page-break/><text:span text:style-name="T2">V.<text:tab/></text:span>Getting the pieces<text:bookmark-end text:name="__RefHeading___Toc499_2460469384"/></text:h>
      <text:h text:style-name="Heading_20_2" text:outline-level="2"><text:bookmark-start text:name="__RefHeading___Toc501_2460469384"/>V.1 development tools<text:bookmark-end text:name="__RefHeading___Toc501_2460469384"/></text:h>
      <text:p text:style-name="P16">vscode</text:p>
      <text:p text:style-name="P16">maven</text:p>
      <text:p text:style-name="P16">java</text:p>
      <text:p text:style-name="P16">spring and spring ai</text:p>
      <text:p text:style-name="P17">spring initializr</text:p>
      <text:p text:style-name="P18">nvm</text:p>
      <text:p text:style-name="P18">npm</text:p>
      <text:p text:style-name="P18">vue3</text:p>
      <text:p text:style-name="P16"/>
      <text:h text:style-name="Heading_20_2" text:outline-level="2"><text:bookmark-start text:name="__RefHeading___Toc503_2460469384"/>V.2 runtime tools<text:bookmark-end text:name="__RefHeading___Toc503_2460469384"/></text:h>
      <text:p text:style-name="P19">Docker</text:p>
      <text:p text:style-name="P20">docker compose</text:p>
      <text:p text:style-name="P16">postgres/pgvector</text:p>
      <text:p text:style-name="P16">neo4j</text:p>
      <text:p text:style-name="P16">opensearch</text:p>
      <text:p text:style-name="P16">opensearch dashboard</text:p>
      <text:p text:style-name="P16">docling</text:p>
      <text:p text:style-name="P16">temporal</text:p>
      <text:p text:style-name="P16">embeddings model</text:p>
      <text:p text:style-name="P16"/>
      <text:h text:style-name="Heading_20_1" text:outline-level="1"><text:bookmark-start text:name="__RefHeading___Toc505_2460469384"/><text:soft-page-break/><text:span text:style-name="T2">VI.<text:tab/></text:span>Starting the pieces<text:bookmark-end text:name="__RefHeading___Toc505_2460469384"/></text:h>
      <text:h text:style-name="Heading_20_1" text:outline-level="1">VI.1 Temporal</text:h>
      <text:h text:style-name="Heading_20_2" text:outline-level="2"/>
      <text:h text:style-name="Heading_20_2" text:outline-level="2">VI.2<text:tab/>Docling</text:h>
      <text:p text:style-name="P21"/>
      <text:h text:style-name="Heading_20_2" text:outline-level="2">VI.3<text:tab/>Pgvector</text:h>
      <text:p text:style-name="P21">docker run -d <text:s text:c="2"/>--name pgvector-db <text:s text:c="2"/>-e POSTGRES_PASSWORD=mysecretpassword <text:s text:c="2"/>-p 5432:5432 <text:s text:c="2"/>pgvector/pgvector:pg17d</text:p>
      <text:h text:style-name="Heading_20_2" text:outline-level="2">VI.4<text:tab/>OpenSearch</text:h>
      <text:p text:style-name="P22"/>
      <text:h text:style-name="Heading_20_1" text:outline-level="1"><text:bookmark-start text:name="__RefHeading___Toc507_2460469384"/><text:span text:style-name="T2">VII.<text:tab/></text:span>Track running <text:span text:style-name="T2">pieces</text:span><text:bookmark-end text:name="__RefHeading___Toc507_2460469384"/></text:h>
      <text:p text:style-name="P12">Docker</text:p>
      <text:p text:style-name="P12">Dock<text:span text:style-name="T8">e</text:span>r compose</text:p>
      <text:p text:style-name="P23">docker logs</text:p>
      <text:p text:style-name="P23">opensearch observability</text:p>
      <text:p text:style-name="P12"/>
      <text:h text:style-name="Heading_20_1" text:outline-level="1"><text:bookmark-start text:name="__RefHeading___Toc509_2460469384"/><text:span text:style-name="T2">VIII.<text:tab/></text:span>Knowledge/info<text:bookmark-end text:name="__RefHeading___Toc509_2460469384"/></text:h>
      <text:p text:style-name="P14">neural networks</text:p>
      <text:p text:style-name="P14">graphs <text:span text:style-name="T4">and analysis</text:span></text:p>
      <text:p text:style-name="P14">cypher-manual</text:p>
      <text:p text:style-name="P14">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5</text:page-number><text:s/>/ <text:page-count>5</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06T17:17:17.761244819</dc:date>
    <meta:editing-duration>PT4H32M49S</meta:editing-duration>
    <meta:editing-cycles>9</meta:editing-cycles>
    <meta:generator>LibreOffice/26.2.0.3$Linux_X86_64 LibreOffice_project/afbbd0df0edb6d40b450b0337ac646b0913a760c</meta:generator>
    <meta:print-date>2026-05-04T18:26:28.877923080</meta:print-date>
    <meta:printed-by>PDF files</meta:printed-by>
    <meta:document-statistic meta:table-count="0" meta:image-count="0" meta:object-count="0" meta:page-count="5" meta:paragraph-count="104" meta:word-count="361" meta:character-count="2537" meta:non-whitespace-character-count="2262"/>
  </office:meta>
</office:document-meta>
</file>