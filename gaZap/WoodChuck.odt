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5478" officeooo:paragraph-rsid="00005478" style:font-size-asian="18pt" style:font-size-complex="18pt"/>
    </style:style>
    <style:style style:name="P2" style:family="paragraph" style:parent-style-name="Standard">
      <style:text-properties officeooo:rsid="00005478" officeooo:paragraph-rsid="00005478"/>
    </style:style>
    <style:style style:name="P3" style:family="paragraph" style:parent-style-name="Standard">
      <style:text-properties fo:font-size="14pt" officeooo:rsid="0002f616" officeooo:paragraph-rsid="0002f616" style:font-size-asian="14pt" style:font-size-complex="14pt"/>
    </style:style>
    <style:style style:name="P4" style:family="paragraph" style:parent-style-name="Standard">
      <style:text-properties officeooo:rsid="0001ea56" officeooo:paragraph-rsid="0001ea56"/>
    </style:style>
    <style:style style:name="P5" style:family="paragraph" style:parent-style-name="Standard">
      <style:text-properties fo:font-size="14pt" officeooo:rsid="0001ea56" officeooo:paragraph-rsid="0001ea56" style:font-size-asian="14pt" style:font-size-complex="14pt"/>
    </style:style>
    <style:style style:name="P6" style:family="paragraph" style:parent-style-name="Standard" style:list-style-name="L1">
      <style:text-properties officeooo:rsid="00005478" officeooo:paragraph-rsid="00005478"/>
    </style:style>
    <style:style style:name="P7" style:family="paragraph" style:parent-style-name="Standard" style:list-style-name="L1">
      <style:text-properties officeooo:rsid="0001ea56" officeooo:paragraph-rsid="0001ea56"/>
    </style:style>
    <style:style style:name="P8" style:family="paragraph" style:parent-style-name="Standard">
      <style:paragraph-properties fo:margin-top="0in" fo:margin-bottom="0.1965in" style:contextual-spacing="false"/>
      <style:text-properties officeooo:rsid="000d4317" officeooo:paragraph-rsid="000d4317"/>
    </style:style>
    <style:style style:name="P9" style:family="paragraph" style:parent-style-name="Standard">
      <style:text-properties officeooo:rsid="00063a6f" officeooo:paragraph-rsid="00063a6f"/>
    </style:style>
    <style:style style:name="P10" style:family="paragraph" style:parent-style-name="Preformatted_20_Text">
      <style:text-properties officeooo:rsid="00063a6f" officeooo:paragraph-rsid="00063a6f"/>
    </style:style>
    <style:style style:name="P11" style:family="paragraph" style:parent-style-name="Standard">
      <style:text-properties officeooo:rsid="00088836" officeooo:paragraph-rsid="00088836"/>
    </style:style>
    <style:style style:name="P12" style:family="paragraph" style:parent-style-name="Standard">
      <style:text-properties officeooo:rsid="000a2aa1" officeooo:paragraph-rsid="000a2aa1"/>
    </style:style>
    <style:style style:name="P13" style:family="paragraph" style:parent-style-name="Standard">
      <style:text-properties officeooo:rsid="000b180c" officeooo:paragraph-rsid="000b180c"/>
    </style:style>
    <style:style style:name="P14" style:family="paragraph" style:parent-style-name="Standard">
      <style:text-properties officeooo:rsid="0004a408" officeooo:paragraph-rsid="0004a408"/>
    </style:style>
    <style:style style:name="P15" style:family="paragraph" style:parent-style-name="Standard">
      <style:text-properties officeooo:rsid="0002f616" officeooo:paragraph-rsid="0002f616"/>
    </style:style>
    <style:style style:name="T1" style:family="text">
      <style:text-properties officeooo:rsid="0004a408"/>
    </style:style>
    <style:style style:name="T2" style:family="text">
      <style:text-properties officeooo:rsid="00063a6f"/>
    </style:style>
    <style:style style:name="T3" style:family="text">
      <style:text-properties officeooo:rsid="0002f616"/>
    </style:style>
    <style:style style:name="T4" style:family="text">
      <style:text-properties officeooo:rsid="0006c31d"/>
    </style:style>
    <style:style style:name="T5" style:family="text">
      <style:text-properties officeooo:rsid="0001ea56"/>
    </style:style>
    <style:style style:name="T6" style:family="text">
      <style:text-properties officeooo:rsid="000d4317"/>
    </style:style>
    <style:style style:name="T7" style:family="text">
      <style:text-properties officeooo:rsid="000a2aa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</text:p>
      <text:p text:style-name="P2"/>
      <text:p text:style-name="P3"><text:span text:style-name="T1">I. </text:span>Introduction</text:p>
      <text:p text:style-name="P2">Create a project with available technology.</text:p>
      <text:p text:style-name="P2">For a solid ‘sink yur teeth in’ architecture plan look at woodchuck.png</text:p>
      <text:p text:style-name="P2"/>
      <text:p text:style-name="P2"/>
      <text:p text:style-name="P2">The initial project should remain flexible – so could be used to kick off a variety of projects.</text:p>
      <text:p text:style-name="P4">Steps should be repeatable.</text:p>
      <text:p text:style-name="P2"/>
      <text:p text:style-name="P2">The current plan is to create a follow-on project that the public can view (WoodChuck).</text:p>
      <text:p text:style-name="P2">Then add on the ability to buy and sell (WoodHawk) – <text:span text:style-name="T2">will require login when buying and selling – no login for just viewing</text:span></text:p>
      <text:p text:style-name="P2"/>
      <text:p text:style-name="P2">The scaffold project will be as shown in the woodchuck.png diagram.</text:p>
      <text:p text:style-name="P2"/>
      <text:p text:style-name="P5"><text:span text:style-name="T1">II. </text:span><text:span text:style-name="T3">Scaffolding </text:span>Subprojects</text:p>
      <text:list text:style-name="L1">
        <text:list-item>
          <text:p text:style-name="P6">UI <text:span text:style-name="T3">(vue3)</text:span></text:p>
        </text:list-item>
        <text:list-item>
          <text:p text:style-name="P6">Gateway <text:span text:style-name="T4">(</text:span><text:span text:style-name="T3">Spring boot, security</text:span><text:span text:style-name="T4">)</text:span></text:p>
        </text:list-item>
        <text:list-item>
          <text:p text:style-name="P6">Keycloak <text:span text:style-name="T5">(OAuth2 – authentication and authorization)</text:span></text:p>
        </text:list-item>
        <text:list-item>
          <text:p text:style-name="P6">Backend (as r<text:span text:style-name="T5">equired – what is the best </text:span><text:span text:style-name="T3">approach </text:span><text:span text:style-name="T5">for each situation?)</text:span></text:p>
        </text:list-item>
        <text:list-item>
          <text:p text:style-name="P7">Kafka (for inter-communication)</text:p>
        </text:list-item>
      </text:list>
      <text:p text:style-name="P4"/>
      <text:p text:style-name="P4"/>
      <text:p text:style-name="P4"/>
      <text:p text:style-name="P5"><text:span text:style-name="T1">III. </text:span>WoodChuck</text:p>
      <text:p text:style-name="P4"/>
      <text:p text:style-name="P8">III.a Keycloak (project currently called docker – poor name)</text:p>
      <text:p text:style-name="Text_20_body"><text:a xlink:type="simple" xlink:href="https://help.zerto.com/bundle/Linux.ZVM.HTML.10.0_U1/page/Creating_Keycloak_Credentials.htm" text:style-name="Internet_20_link" text:visited-style-name="Visited_20_Internet_20_Link">https://help.zerto.com/bundle/Linux.ZVM.HTML.10.0_U1/page/Creating_Keycloak_Credentials.htm</text:a></text:p>
      <text:p text:style-name="Text_20_body"/>
      <text:p text:style-name="P9">III.<text:span text:style-name="T6">b</text:span> UI</text:p>
      <text:p text:style-name="P9">Add keycloak.js</text:p>
      <text:p text:style-name="P9">Add axios</text:p>
      <text:p text:style-name="P10"><text:bookmark text:name="d711"/>npm install @josempgon/vue-keycloak</text:p>
      <text:p text:style-name="P9"/>
      <text:p text:style-name="P9"/>
      <text:p text:style-name="P11">III.<text:span text:style-name="T6">c</text:span> Gateway <text:span text:style-name="T7">(reactive)</text:span></text:p>
      <text:p text:style-name="P11">set routes,</text:p>
      <text:p text:style-name="P12">23 Feb 2026 – mvn clean package</text:p>
      <text:p text:style-name="P12"><text:tab/><text:tab/>java -Dspring.profiles.active=develop -jar ./target/demo-0.0.1-SNAPSHOT.jar --debug</text:p>
      <text:p text:style-name="P12"><text:tab/><text:tab/>project stands up without failure, how functional – need to test and learn</text:p>
      <text:p text:style-name="P13">UserService.java has a hard coded userDetails response.</text:p>
      <text:p text:style-name="P13"/>
      <text:p text:style-name="P13"><text:a xlink:type="simple" xlink:href="https://www.keycloak.org/securing-apps/authz-client" text:style-name="Internet_20_link" text:visited-style-name="Visited_20_Internet_20_Link">https://www.keycloak.org/securing-apps/authz-client</text:a> </text:p>
      <text:p text:style-name="P13"/>
      <text:p text:style-name="P9"/>
      <text:p text:style-name="P4"><text:soft-page-break/><text:span text:style-name="T2">III.</text:span><text:span text:style-name="T6">d</text:span><text:span text:style-name="T2"> </text:span>Backend</text:p>
      <text:p text:style-name="P4">Created with bootify.io – Spring Boot CRUD.</text:p>
      <text:p text:style-name="P4">Began with an inventories table.</text:p>
      <text:p text:style-name="P4"/>
      <text:p text:style-name="P14">Need field to contain location (State) where product is located.</text:p>
      <text:p text:style-name="P14">Need field to contain location on file system where photos are located.</text:p>
      <text:p text:style-name="P14">Contact table(s) current owner</text:p>
      <text:p text:style-name="P4"/>
      <text:p text:style-name="P4"/>
      <text:p text:style-name="P3"><text:span text:style-name="T1">IV. </text:span>WoodHawk</text:p>
      <text:p text:style-name="P15"/>
      <text:p text:style-name="P15">Add buyer and seller contact.</text:p>
      <text:p text:style-name="P15">Add prices.</text:p>
      <text:p text:style-name="P14">Delivery?</text:p>
      <text:p text:style-name="P14">Contact table(s) buyer and seller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09:04:03.944714492</meta:creation-date>
    <dc:date>2026-02-20T18:30:20.985329048</dc:date>
    <meta:editing-duration>PT3H11M49S</meta:editing-duration>
    <meta:editing-cycles>7</meta:editing-cycles>
    <meta:generator>LibreOffice/26.2.0.3$Linux_X86_64 LibreOffice_project/afbbd0df0edb6d40b450b0337ac646b0913a760c</meta:generator>
    <meta:document-statistic meta:table-count="0" meta:image-count="0" meta:object-count="0" meta:page-count="2" meta:paragraph-count="40" meta:word-count="234" meta:character-count="1670" meta:non-whitespace-character-count="1468"/>
  </office:meta>
</office:document-meta>
</file>