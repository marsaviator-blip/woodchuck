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 draw:auto-grow-height="false" fo:min-height="1.655cm" fo:min-width="3.31cm" loext:decorative="false"/>
      <style:paragraph-properties style:writing-mode="lr-tb"/>
    </style:style>
    <style:style style:name="gr2" style:family="graphic" style:parent-style-name="standard">
      <style:graphic-properties draw:fill="solid" draw:fill-color="#8e86ae" draw:textarea-vertical-align="middle" draw:auto-grow-height="false" fo:min-height="5.395cm" fo:min-width="3.31cm" loext:decorative="false"/>
      <style:paragraph-properties style:writing-mode="lr-tb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standard">
      <style:graphic-properties draw:textarea-vertical-align="middle" loext:decorative="false"/>
    </style:style>
    <style:style style:name="gr6" style:family="graphic" style:parent-style-name="standard">
      <style:graphic-properties draw:textarea-vertical-align="middle" loext:decorative="false"/>
      <style:paragraph-properties style:writing-mode="lr-tb"/>
    </style:style>
    <style:style style:name="gr7" style:family="graphic" style:parent-style-name="standard">
      <style:graphic-properties draw:textarea-vertical-align="middle" draw:auto-grow-height="false" fo:min-height="1.02cm" fo:min-width="2.675cm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solid" draw:fill-color="#8e86ae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81cm" svg:height="1.905cm" svg:x="2.54cm" svg:y="2.591cm">
          <text:p text:style-name="P1"><text:span text:style-name="T1">Spring Ap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5.645cm" svg:x="2.54cm" svg:y="5.785cm">
          <text:p text:style-name="P1"><text:span text:style-name="T1">Micrometer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7.621cm" svg:y1="10.36cm" svg:x2="9.54cm" svg:y2="10.36cm">
          <text:p/>
        </draw:line>
        <draw:frame draw:style-name="gr4" draw:text-style-name="P5" draw:layer="layout" svg:width="2.949cm" svg:height="2.621cm" svg:x="2.975cm" svg:y="3.829cm">
          <draw:text-box>
            <text:p/>
            <text:p text:style-name="P1"><text:span text:style-name="T2">instrumented</text:span></text:p>
            <text:p text:style-name="P1"><text:span text:style-name="T2">with</text:span></text:p>
            <text:p/>
          </draw:text-box>
        </draw:frame>
        <draw:custom-shape draw:style-name="gr1" draw:text-style-name="P2" draw:layer="layout" svg:width="3.81cm" svg:height="1.905cm" svg:x="21.14cm" svg:y="7.493cm">
          <text:p text:style-name="P1"><text:span text:style-name="T1">Grafan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905cm" svg:x="21.14cm" svg:y="9.694cm">
          <text:p text:style-name="P1"><text:span text:style-name="T1">OpenSearch</text:span></text:p>
          <text:p text:style-name="P1"><text:span text:style-name="T1">Dashboar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905cm" svg:x="14.24cm" svg:y="7.493cm">
          <text:p text:style-name="P1"><text:span text:style-name="T1">Promethe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905cm" svg:x="14.24cm" svg:y="9.694cm">
          <text:p text:style-name="P1"><text:span text:style-name="T1">OpenSearch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1.905cm" svg:y1="2.654cm" svg:x2="-0.406cm" svg:y2="2.654cm">
          <text:p/>
        </draw:line>
        <draw:line draw:style-name="gr3" draw:text-style-name="P4" draw:layer="layout" svg:x1="7.62cm" svg:y1="8.89cm" svg:x2="14.24cm" svg:y2="8.89cm">
          <text:p/>
        </draw:line>
        <draw:line draw:style-name="gr3" draw:text-style-name="P4" draw:layer="layout" svg:x1="18.05cm" svg:y1="8.055cm" svg:x2="21.14cm" svg:y2="8.055cm">
          <text:p/>
        </draw:line>
        <draw:line draw:style-name="gr3" draw:text-style-name="P4" draw:layer="layout" svg:x1="13.35cm" svg:y1="10.795cm" svg:x2="14.24cm" svg:y2="10.795cm">
          <text:p/>
        </draw:line>
        <draw:line draw:style-name="gr3" draw:text-style-name="P4" draw:layer="layout" svg:x1="18.05cm" svg:y1="10.995cm" svg:x2="21.14cm" svg:y2="10.995cm">
          <text:p/>
        </draw:line>
        <draw:line draw:style-name="gr3" draw:text-style-name="P4" draw:layer="layout" svg:x1="18.05cm" svg:y1="10.16cm" svg:x2="21.141cm" svg:y2="8.769cm">
          <text:p/>
        </draw:line>
        <draw:line draw:style-name="gr3" draw:text-style-name="P4" draw:layer="layout" svg:x1="18.05cm" svg:y1="8.89cm" svg:x2="21.141cm" svg:y2="10.16cm">
          <text:p/>
        </draw:line>
        <draw:line draw:style-name="gr6" draw:text-style-name="P1" draw:layer="layout" svg:x1="4.445cm" svg:y1="5.785cm" svg:x2="4.445cm" svg:y2="4.496cm">
          <text:p/>
        </draw:line>
        <draw:frame draw:style-name="gr4" draw:text-style-name="P5" draw:layer="layout" svg:width="2.549cm" svg:height="2.147cm" svg:x="14.27cm" svg:y="6.108cm">
          <draw:text-box>
            <text:p/>
            <text:p text:style-name="P1"><text:span text:style-name="T2">time series</text:span></text:p>
            <text:p/>
          </draw:text-box>
        </draw:frame>
        <draw:custom-shape draw:style-name="gr7" draw:text-style-name="P2" draw:layer="layout" svg:width="3.175cm" svg:height="1.27cm" svg:x="4.445cm" svg:y="8.255cm">
          <text:p text:style-name="P1"><text:span text:style-name="T1">metric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175cm" svg:height="1.27cm" svg:x="4.446cm" svg:y="9.655cm">
          <text:p text:style-name="P1"><text:span text:style-name="T1">trac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905cm" svg:x="9.54cm" svg:y="9.695cm">
          <text:p text:style-name="P1"><text:span text:style-name="T1">DataPrepper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278cm" svg:height="2.147cm" svg:x="7.82cm" svg:y="9.49cm">
          <draw:text-box>
            <text:p/>
            <text:p text:style-name="P1"><text:span text:style-name="T2">Otel</text:span></text:p>
            <text:p/>
          </draw:text-box>
        </draw:frame>
        <draw:frame draw:style-name="gr4" draw:text-style-name="P7" draw:layer="layout" svg:width="5.41cm" svg:height="1.119cm" svg:x="12.073cm" svg:y="1.544cm">
          <draw:text-box>
            <text:p text:style-name="P6"><text:span text:style-name="T3">Observability</text:span></text:p>
          </draw:text-box>
        </draw:frame>
        <draw:frame draw:style-name="gr4" draw:text-style-name="P5" draw:layer="layout" svg:width="8.48cm" svg:height="0.962cm" svg:x="10.16cm" svg:y="3.775cm">
          <draw:text-box>
            <text:p>High level – need the details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Concave" svg:viewBox="0 0 1131 1580" svg:d="M1013 1491l118 89-567-1580-564 1580 114-85 136-68 148-46 161-17 161 13 153 46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end="Concave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8T15:02:35.900274792</meta:creation-date>
    <dc:date>2026-05-08T15:49:29.116335919</dc:date>
    <meta:editing-duration>PT4M4S</meta:editing-duration>
    <meta:editing-cycles>1</meta:editing-cycles>
    <meta:document-statistic meta:object-count="46"/>
    <meta:generator>LibreOffice/26.2.0.3$Linux_X86_64 LibreOffice_project/afbbd0df0edb6d40b450b0337ac646b0913a760c</meta:generator>
  </office:meta>
</office:document-meta>
</file>